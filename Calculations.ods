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53in" svg:height="3.5445in" svg:x="4.8941in" svg:y="1.289in">
            <draw:object draw:notify-on-update-of-ranges="Sheet1.D9:Sheet1.D108 Sheet1.D9:Sheet1.D108 Sheet1.E8:Sheet1.E8 Sheet1.E9:Sheet1.E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ep 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Qmax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tep 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3"/>
          <table:table-cell table:number-matrix-columns-spanned="1" table:number-matrix-rows-spanned="100" table:formula="of:=10^( -1 + 2*COM.MICROSOFT.SEQUENCE(100;1;0;1)/99 )" office:value-type="float" office:value="0.1" calcext:value-type="float">
            <text:p>0.1</text:p>
          </table:table-cell>
          <table:table-cell table:formula="of:=([.D9]^2*([.$B$8]-1))/SQRT(([.$B$8]*[.D9]^2-1)^2 + [.D9]^2*([.D9]^2-1)^2*([.$B$8]-1)^2*[.$B$3]^2)" office:value-type="float" office:value="0.0311162671272858" calcext:value-type="float">
            <text:p>0.0311162671272858</text:p>
          </table:table-cell>
        </table:table-row>
        <table:table-row table:style-name="ro1">
          <table:table-cell table:number-columns-repeated="3"/>
          <table:table-cell office:value-type="float" office:value="0.104761575278966" calcext:value-type="float">
            <text:p>0.104761575278966</text:p>
          </table:table-cell>
          <table:table-cell table:formula="of:=([.D10]^2*([.$B$8]-1))/SQRT(([.$B$8]*[.D10]^2-1)^2 + [.D10]^2*([.D10]^2-1)^2*([.$B$8]-1)^2*[.$B$3]^2)" office:value-type="float" office:value="0.0342741026771124" calcext:value-type="float">
            <text:p>0.0342741026771124</text:p>
          </table:table-cell>
        </table:table-row>
        <table:table-row table:style-name="ro1">
          <table:table-cell table:number-columns-repeated="3"/>
          <table:table-cell office:value-type="float" office:value="0.109749876549306" calcext:value-type="float">
            <text:p>0.109749876549306</text:p>
          </table:table-cell>
          <table:table-cell table:formula="of:=([.D11]^2*([.$B$8]-1))/SQRT(([.$B$8]*[.D11]^2-1)^2 + [.D11]^2*([.D11]^2-1)^2*([.$B$8]-1)^2*[.$B$3]^2)" office:value-type="float" office:value="0.0377662600572139" calcext:value-type="float">
            <text:p>0.0377662600572139</text:p>
          </table:table-cell>
        </table:table-row>
        <table:table-row table:style-name="ro1">
          <table:table-cell table:number-columns-repeated="3"/>
          <table:table-cell office:value-type="float" office:value="0.114975699539774" calcext:value-type="float">
            <text:p>0.114975699539774</text:p>
          </table:table-cell>
          <table:table-cell table:formula="of:=([.D12]^2*([.$B$8]-1))/SQRT(([.$B$8]*[.D12]^2-1)^2 + [.D12]^2*([.D12]^2-1)^2*([.$B$8]-1)^2*[.$B$3]^2)" office:value-type="float" office:value="0.0416311009413899" calcext:value-type="float">
            <text:p>0.0416311009413899</text:p>
          </table:table-cell>
        </table:table-row>
        <table:table-row table:style-name="ro1">
          <table:table-cell table:number-columns-repeated="3"/>
          <table:table-cell office:value-type="float" office:value="0.120450354025878" calcext:value-type="float">
            <text:p>0.120450354025878</text:p>
          </table:table-cell>
          <table:table-cell table:formula="of:=([.D13]^2*([.$B$8]-1))/SQRT(([.$B$8]*[.D13]^2-1)^2 + [.D13]^2*([.D13]^2-1)^2*([.$B$8]-1)^2*[.$B$3]^2)" office:value-type="float" office:value="0.0459120288675821" calcext:value-type="float">
            <text:p>0.0459120288675821</text:p>
          </table:table-cell>
        </table:table-row>
        <table:table-row table:style-name="ro1">
          <table:table-cell table:number-columns-repeated="3"/>
          <table:table-cell office:value-type="float" office:value="0.126185688306602" calcext:value-type="float">
            <text:p>0.126185688306602</text:p>
          </table:table-cell>
          <table:table-cell table:formula="of:=([.D14]^2*([.$B$8]-1))/SQRT(([.$B$8]*[.D14]^2-1)^2 + [.D14]^2*([.D14]^2-1)^2*([.$B$8]-1)^2*[.$B$3]^2)" office:value-type="float" office:value="0.0506582897176557" calcext:value-type="float">
            <text:p>0.0506582897176557</text:p>
          </table:table-cell>
        </table:table-row>
        <table:table-row table:style-name="ro1">
          <table:table-cell table:number-columns-repeated="3"/>
          <table:table-cell office:value-type="float" office:value="0.132194114846603" calcext:value-type="float">
            <text:p>0.132194114846603</text:p>
          </table:table-cell>
          <table:table-cell table:formula="of:=([.D15]^2*([.$B$8]-1))/SQRT(([.$B$8]*[.D15]^2-1)^2 + [.D15]^2*([.D15]^2-1)^2*([.$B$8]-1)^2*[.$B$3]^2)" office:value-type="float" office:value="0.0559259287384546" calcext:value-type="float">
            <text:p>0.0559259287384546</text:p>
          </table:table-cell>
        </table:table-row>
        <table:table-row table:style-name="ro1">
          <table:table-cell table:number-columns-repeated="3"/>
          <table:table-cell office:value-type="float" office:value="0.138488637139387" calcext:value-type="float">
            <text:p>0.138488637139387</text:p>
          </table:table-cell>
          <table:table-cell table:formula="of:=([.D16]^2*([.$B$8]-1))/SQRT(([.$B$8]*[.D16]^2-1)^2 + [.D16]^2*([.D16]^2-1)^2*([.$B$8]-1)^2*[.$B$3]^2)" office:value-type="float" office:value="0.0617789411250949" calcext:value-type="float">
            <text:p>0.0617789411250949</text:p>
          </table:table-cell>
        </table:table-row>
        <table:table-row table:style-name="ro1">
          <table:table-cell table:number-columns-repeated="3"/>
          <table:table-cell office:value-type="float" office:value="0.145082877849594" calcext:value-type="float">
            <text:p>0.145082877849594</text:p>
          </table:table-cell>
          <table:table-cell table:formula="of:=([.D17]^2*([.$B$8]-1))/SQRT(([.$B$8]*[.D17]^2-1)^2 + [.D17]^2*([.D17]^2-1)^2*([.$B$8]-1)^2*[.$B$3]^2)" office:value-type="float" office:value="0.0682906634718461" calcext:value-type="float">
            <text:p>0.0682906634718461</text:p>
          </table:table-cell>
        </table:table-row>
        <table:table-row table:style-name="ro1">
          <table:table-cell table:number-columns-repeated="3"/>
          <table:table-cell office:value-type="float" office:value="0.151991108295293" calcext:value-type="float">
            <text:p>0.151991108295293</text:p>
          </table:table-cell>
          <table:table-cell table:formula="of:=([.D18]^2*([.$B$8]-1))/SQRT(([.$B$8]*[.D18]^2-1)^2 + [.D18]^2*([.D18]^2-1)^2*([.$B$8]-1)^2*[.$B$3]^2)" office:value-type="float" office:value="0.0755454669649405" calcext:value-type="float">
            <text:p>0.0755454669649405</text:p>
          </table:table-cell>
        </table:table-row>
        <table:table-row table:style-name="ro1">
          <table:table-cell table:number-columns-repeated="3"/>
          <table:table-cell office:value-type="float" office:value="0.159228279334109" calcext:value-type="float">
            <text:p>0.159228279334109</text:p>
          </table:table-cell>
          <table:table-cell table:formula="of:=([.D19]^2*([.$B$8]-1))/SQRT(([.$B$8]*[.D19]^2-1)^2 + [.D19]^2*([.D19]^2-1)^2*([.$B$8]-1)^2*[.$B$3]^2)" office:value-type="float" office:value="0.0836408312340607" calcext:value-type="float">
            <text:p>0.0836408312340607</text:p>
          </table:table-cell>
        </table:table-row>
        <table:table-row table:style-name="ro1">
          <table:table-cell table:number-columns-repeated="3"/>
          <table:table-cell office:value-type="float" office:value="0.166810053720006" calcext:value-type="float">
            <text:p>0.166810053720006</text:p>
          </table:table-cell>
          <table:table-cell table:formula="of:=([.D20]^2*([.$B$8]-1))/SQRT(([.$B$8]*[.D20]^2-1)^2 + [.D20]^2*([.D20]^2-1)^2*([.$B$8]-1)^2*[.$B$3]^2)" office:value-type="float" office:value="0.0926899019653648" calcext:value-type="float">
            <text:p>0.0926899019653648</text:p>
          </table:table-cell>
        </table:table-row>
        <table:table-row table:style-name="ro1">
          <table:table-cell table:number-columns-repeated="3"/>
          <table:table-cell office:value-type="float" office:value="0.174752840000768" calcext:value-type="float">
            <text:p>0.174752840000768</text:p>
          </table:table-cell>
          <table:table-cell table:formula="of:=([.D21]^2*([.$B$8]-1))/SQRT(([.$B$8]*[.D21]^2-1)^2 + [.D21]^2*([.D21]^2-1)^2*([.$B$8]-1)^2*[.$B$3]^2)" office:value-type="float" office:value="0.102824668075951" calcext:value-type="float">
            <text:p>0.102824668075951</text:p>
          </table:table-cell>
        </table:table-row>
        <table:table-row table:style-name="ro1">
          <table:table-cell table:number-columns-repeated="3"/>
          <table:table-cell office:value-type="float" office:value="0.183073828029537" calcext:value-type="float">
            <text:p>0.183073828029537</text:p>
          </table:table-cell>
          <table:table-cell table:formula="of:=([.D22]^2*([.$B$8]-1))/SQRT(([.$B$8]*[.D22]^2-1)^2 + [.D22]^2*([.D22]^2-1)^2*([.$B$8]-1)^2*[.$B$3]^2)" office:value-type="float" office:value="0.114199938841885" calcext:value-type="float">
            <text:p>0.114199938841885</text:p>
          </table:table-cell>
        </table:table-row>
        <table:table-row table:style-name="ro1">
          <table:table-cell table:number-columns-repeated="3"/>
          <table:table-cell office:value-type="float" office:value="0.191791026167249" calcext:value-type="float">
            <text:p>0.191791026167249</text:p>
          </table:table-cell>
          <table:table-cell table:formula="of:=([.D23]^2*([.$B$8]-1))/SQRT(([.$B$8]*[.D23]^2-1)^2 + [.D23]^2*([.D23]^2-1)^2*([.$B$8]-1)^2*[.$B$3]^2)" office:value-type="float" office:value="0.126998362739329" calcext:value-type="float">
            <text:p>0.126998362739329</text:p>
          </table:table-cell>
        </table:table-row>
        <table:table-row table:style-name="ro1">
          <table:table-cell table:number-columns-repeated="3"/>
          <table:table-cell office:value-type="float" office:value="0.200923300256505" calcext:value-type="float">
            <text:p>0.200923300256505</text:p>
          </table:table-cell>
          <table:table-cell table:formula="of:=([.D24]^2*([.$B$8]-1))/SQRT(([.$B$8]*[.D24]^2-1)^2 + [.D24]^2*([.D24]^2-1)^2*([.$B$8]-1)^2*[.$B$3]^2)" office:value-type="float" office:value="0.141436814996809" calcext:value-type="float">
            <text:p>0.141436814996809</text:p>
          </table:table-cell>
        </table:table-row>
        <table:table-row table:style-name="ro1">
          <table:table-cell table:number-columns-repeated="3"/>
          <table:table-cell office:value-type="float" office:value="0.210490414451202" calcext:value-type="float">
            <text:p>0.210490414451202</text:p>
          </table:table-cell>
          <table:table-cell table:formula="of:=([.D25]^2*([.$B$8]-1))/SQRT(([.$B$8]*[.D25]^2-1)^2 + [.D25]^2*([.D25]^2-1)^2*([.$B$8]-1)^2*[.$B$3]^2)" office:value-type="float" office:value="0.157774600363183" calcext:value-type="float">
            <text:p>0.157774600363183</text:p>
          </table:table-cell>
        </table:table-row>
        <table:table-row table:style-name="ro1">
          <table:table-cell table:number-columns-repeated="3"/>
          <table:table-cell office:value-type="float" office:value="0.220513073990305" calcext:value-type="float">
            <text:p>0.220513073990305</text:p>
          </table:table-cell>
          <table:table-cell table:formula="of:=([.D26]^2*([.$B$8]-1))/SQRT(([.$B$8]*[.D26]^2-1)^2 + [.D26]^2*([.D26]^2-1)^2*([.$B$8]-1)^2*[.$B$3]^2)" office:value-type="float" office:value="0.17632408670343" calcext:value-type="float">
            <text:p>0.17632408670343</text:p>
          </table:table-cell>
        </table:table-row>
        <table:table-row table:style-name="ro1">
          <table:table-cell table:number-columns-repeated="3"/>
          <table:table-cell office:value-type="float" office:value="0.231012970008316" calcext:value-type="float">
            <text:p>0.231012970008316</text:p>
          </table:table-cell>
          <table:table-cell table:formula="of:=([.D27]^2*([.$B$8]-1))/SQRT(([.$B$8]*[.D27]^2-1)^2 + [.D27]^2*([.D27]^2-1)^2*([.$B$8]-1)^2*[.$B$3]^2)" office:value-type="float" office:value="0.197464626452656" calcext:value-type="float">
            <text:p>0.197464626452656</text:p>
          </table:table-cell>
        </table:table-row>
        <table:table-row table:style-name="ro1">
          <table:table-cell table:number-columns-repeated="3"/>
          <table:table-cell office:value-type="float" office:value="0.242012826479438" calcext:value-type="float">
            <text:p>0.242012826479438</text:p>
          </table:table-cell>
          <table:table-cell table:formula="of:=([.D28]^2*([.$B$8]-1))/SQRT(([.$B$8]*[.D28]^2-1)^2 + [.D28]^2*([.D28]^2-1)^2*([.$B$8]-1)^2*[.$B$3]^2)" office:value-type="float" office:value="0.221660970343549" calcext:value-type="float">
            <text:p>0.221660970343549</text:p>
          </table:table-cell>
        </table:table-row>
        <table:table-row table:style-name="ro1">
          <table:table-cell table:number-columns-repeated="3"/>
          <table:table-cell office:value-type="float" office:value="0.253536449397011" calcext:value-type="float">
            <text:p>0.253536449397011</text:p>
          </table:table-cell>
          <table:table-cell table:formula="of:=([.D29]^2*([.$B$8]-1))/SQRT(([.$B$8]*[.D29]^2-1)^2 + [.D29]^2*([.D29]^2-1)^2*([.$B$8]-1)^2*[.$B$3]^2)" office:value-type="float" office:value="0.249487880750299" calcext:value-type="float">
            <text:p>0.249487880750299</text:p>
          </table:table-cell>
        </table:table-row>
        <table:table-row table:style-name="ro1">
          <table:table-cell table:number-columns-repeated="3"/>
          <table:table-cell office:value-type="float" office:value="0.265608778294669" calcext:value-type="float">
            <text:p>0.265608778294669</text:p>
          </table:table-cell>
          <table:table-cell table:formula="of:=([.D30]^2*([.$B$8]-1))/SQRT(([.$B$8]*[.D30]^2-1)^2 + [.D30]^2*([.D30]^2-1)^2*([.$B$8]-1)^2*[.$B$3]^2)" office:value-type="float" office:value="0.281663382150671" calcext:value-type="float">
            <text:p>0.281663382150671</text:p>
          </table:table-cell>
        </table:table-row>
        <table:table-row table:style-name="ro1">
          <table:table-cell table:number-columns-repeated="3"/>
          <table:table-cell office:value-type="float" office:value="0.278255940220712" calcext:value-type="float">
            <text:p>0.278255940220712</text:p>
          </table:table-cell>
          <table:table-cell table:formula="of:=([.D31]^2*([.$B$8]-1))/SQRT(([.$B$8]*[.D31]^2-1)^2 + [.D31]^2*([.D31]^2-1)^2*([.$B$8]-1)^2*[.$B$3]^2)" office:value-type="float" office:value="0.319094142768658" calcext:value-type="float">
            <text:p>0.319094142768658</text:p>
          </table:table-cell>
        </table:table-row>
        <table:table-row table:style-name="ro1">
          <table:table-cell table:number-columns-repeated="3"/>
          <table:table-cell office:value-type="float" office:value="0.291505306282518" calcext:value-type="float">
            <text:p>0.291505306282518</text:p>
          </table:table-cell>
          <table:table-cell table:formula="of:=([.D32]^2*([.$B$8]-1))/SQRT(([.$B$8]*[.D32]^2-1)^2 + [.D32]^2*([.D32]^2-1)^2*([.$B$8]-1)^2*[.$B$3]^2)" office:value-type="float" office:value="0.362937987561707" calcext:value-type="float">
            <text:p>0.362937987561707</text:p>
          </table:table-cell>
        </table:table-row>
        <table:table-row table:style-name="ro1">
          <table:table-cell table:number-columns-repeated="3"/>
          <table:table-cell office:value-type="float" office:value="0.305385550883342" calcext:value-type="float">
            <text:p>0.305385550883342</text:p>
          </table:table-cell>
          <table:table-cell table:formula="of:=([.D33]^2*([.$B$8]-1))/SQRT(([.$B$8]*[.D33]^2-1)^2 + [.D33]^2*([.D33]^2-1)^2*([.$B$8]-1)^2*[.$B$3]^2)" office:value-type="float" office:value="0.414690606575513" calcext:value-type="float">
            <text:p>0.414690606575513</text:p>
          </table:table-cell>
        </table:table-row>
        <table:table-row table:style-name="ro1">
          <table:table-cell table:number-columns-repeated="3"/>
          <table:table-cell office:value-type="float" office:value="0.319926713779738" calcext:value-type="float">
            <text:p>0.319926713779738</text:p>
          </table:table-cell>
          <table:table-cell table:formula="of:=([.D34]^2*([.$B$8]-1))/SQRT(([.$B$8]*[.D34]^2-1)^2 + [.D34]^2*([.D34]^2-1)^2*([.$B$8]-1)^2*[.$B$3]^2)" office:value-type="float" office:value="0.47630608205486" calcext:value-type="float">
            <text:p>0.47630608205486</text:p>
          </table:table-cell>
        </table:table-row>
        <table:table-row table:style-name="ro1">
          <table:table-cell table:number-columns-repeated="3"/>
          <table:table-cell office:value-type="float" office:value="0.335160265093884" calcext:value-type="float">
            <text:p>0.335160265093884</text:p>
          </table:table-cell>
          <table:table-cell table:formula="of:=([.D35]^2*([.$B$8]-1))/SQRT(([.$B$8]*[.D35]^2-1)^2 + [.D35]^2*([.D35]^2-1)^2*([.$B$8]-1)^2*[.$B$3]^2)" office:value-type="float" office:value="0.550363164812421" calcext:value-type="float">
            <text:p>0.550363164812421</text:p>
          </table:table-cell>
        </table:table-row>
        <table:table-row table:style-name="ro1">
          <table:table-cell table:number-columns-repeated="3"/>
          <table:table-cell office:value-type="float" office:value="0.351119173421513" calcext:value-type="float">
            <text:p>0.351119173421513</text:p>
          </table:table-cell>
          <table:table-cell table:formula="of:=([.D36]^2*([.$B$8]-1))/SQRT(([.$B$8]*[.D36]^2-1)^2 + [.D36]^2*([.D36]^2-1)^2*([.$B$8]-1)^2*[.$B$3]^2)" office:value-type="float" office:value="0.64028826077573" calcext:value-type="float">
            <text:p>0.64028826077573</text:p>
          </table:table-cell>
        </table:table-row>
        <table:table-row table:style-name="ro1">
          <table:table-cell table:number-columns-repeated="3"/>
          <table:table-cell office:value-type="float" office:value="0.367837977182863" calcext:value-type="float">
            <text:p>0.367837977182863</text:p>
          </table:table-cell>
          <table:table-cell table:formula="of:=([.D37]^2*([.$B$8]-1))/SQRT(([.$B$8]*[.D37]^2-1)^2 + [.D37]^2*([.D37]^2-1)^2*([.$B$8]-1)^2*[.$B$3]^2)" office:value-type="float" office:value="0.750631790574491" calcext:value-type="float">
            <text:p>0.750631790574491</text:p>
          </table:table-cell>
        </table:table-row>
        <table:table-row table:style-name="ro1">
          <table:table-cell table:number-columns-repeated="3"/>
          <table:table-cell office:value-type="float" office:value="0.385352859371053" calcext:value-type="float">
            <text:p>0.385352859371053</text:p>
          </table:table-cell>
          <table:table-cell table:formula="of:=([.D38]^2*([.$B$8]-1))/SQRT(([.$B$8]*[.D38]^2-1)^2 + [.D38]^2*([.D38]^2-1)^2*([.$B$8]-1)^2*[.$B$3]^2)" office:value-type="float" office:value="0.887336159091509" calcext:value-type="float">
            <text:p>0.887336159091509</text:p>
          </table:table-cell>
        </table:table-row>
        <table:table-row table:style-name="ro1">
          <table:table-cell table:number-columns-repeated="3"/>
          <table:table-cell office:value-type="float" office:value="0.403701725859655" calcext:value-type="float">
            <text:p>0.403701725859655</text:p>
          </table:table-cell>
          <table:table-cell table:formula="of:=([.D39]^2*([.$B$8]-1))/SQRT(([.$B$8]*[.D39]^2-1)^2 + [.D39]^2*([.D39]^2-1)^2*([.$B$8]-1)^2*[.$B$3]^2)" office:value-type="float" office:value="1.05774253962033" calcext:value-type="float">
            <text:p>1.05774253962033</text:p>
          </table:table-cell>
        </table:table-row>
        <table:table-row table:style-name="ro1">
          <table:table-cell table:number-columns-repeated="3"/>
          <table:table-cell office:value-type="float" office:value="0.42292428743895" calcext:value-type="float">
            <text:p>0.42292428743895</text:p>
          </table:table-cell>
          <table:table-cell table:formula="of:=([.D40]^2*([.$B$8]-1))/SQRT(([.$B$8]*[.D40]^2-1)^2 + [.D40]^2*([.D40]^2-1)^2*([.$B$8]-1)^2*[.$B$3]^2)" office:value-type="float" office:value="1.26953336977044" calcext:value-type="float">
            <text:p>1.26953336977044</text:p>
          </table:table-cell>
        </table:table-row>
        <table:table-row table:style-name="ro1">
          <table:table-cell table:number-columns-repeated="3"/>
          <table:table-cell office:value-type="float" office:value="0.443062145758388" calcext:value-type="float">
            <text:p>0.443062145758388</text:p>
          </table:table-cell>
          <table:table-cell table:formula="of:=([.D41]^2*([.$B$8]-1))/SQRT(([.$B$8]*[.D41]^2-1)^2 + [.D41]^2*([.D41]^2-1)^2*([.$B$8]-1)^2*[.$B$3]^2)" office:value-type="float" office:value="1.52648608900156" calcext:value-type="float">
            <text:p>1.52648608900156</text:p>
          </table:table-cell>
        </table:table-row>
        <table:table-row table:style-name="ro1">
          <table:table-cell table:number-columns-repeated="3"/>
          <table:table-cell office:value-type="float" office:value="0.464158883361278" calcext:value-type="float">
            <text:p>0.464158883361278</text:p>
          </table:table-cell>
          <table:table-cell table:formula="of:=([.D42]^2*([.$B$8]-1))/SQRT(([.$B$8]*[.D42]^2-1)^2 + [.D42]^2*([.D42]^2-1)^2*([.$B$8]-1)^2*[.$B$3]^2)" office:value-type="float" office:value="1.81707009250832" calcext:value-type="float">
            <text:p>1.81707009250832</text:p>
          </table:table-cell>
        </table:table-row>
        <table:table-row table:style-name="ro1">
          <table:table-cell table:number-columns-repeated="3"/>
          <table:table-cell office:value-type="float" office:value="0.486260158006535" calcext:value-type="float">
            <text:p>0.486260158006535</text:p>
          </table:table-cell>
          <table:table-cell table:formula="of:=([.D43]^2*([.$B$8]-1))/SQRT(([.$B$8]*[.D43]^2-1)^2 + [.D43]^2*([.D43]^2-1)^2*([.$B$8]-1)^2*[.$B$3]^2)" office:value-type="float" office:value="2.09541218649435" calcext:value-type="float">
            <text:p>2.09541218649435</text:p>
          </table:table-cell>
        </table:table-row>
        <table:table-row table:style-name="ro1">
          <table:table-cell table:number-columns-repeated="3"/>
          <table:table-cell office:value-type="float" office:value="0.509413801481638" calcext:value-type="float">
            <text:p>0.509413801481638</text:p>
          </table:table-cell>
          <table:table-cell table:formula="of:=([.D44]^2*([.$B$8]-1))/SQRT(([.$B$8]*[.D44]^2-1)^2 + [.D44]^2*([.D44]^2-1)^2*([.$B$8]-1)^2*[.$B$3]^2)" office:value-type="float" office:value="2.27887679572671" calcext:value-type="float">
            <text:p>2.27887679572671</text:p>
          </table:table-cell>
        </table:table-row>
        <table:table-row table:style-name="ro1">
          <table:table-cell table:number-columns-repeated="3"/>
          <table:table-cell office:value-type="float" office:value="0.533669923120631" calcext:value-type="float">
            <text:p>0.533669923120631</text:p>
          </table:table-cell>
          <table:table-cell table:formula="of:=([.D45]^2*([.$B$8]-1))/SQRT(([.$B$8]*[.D45]^2-1)^2 + [.D45]^2*([.D45]^2-1)^2*([.$B$8]-1)^2*[.$B$3]^2)" office:value-type="float" office:value="2.30517726447719" calcext:value-type="float">
            <text:p>2.30517726447719</text:p>
          </table:table-cell>
        </table:table-row>
        <table:table-row table:style-name="ro1">
          <table:table-cell table:number-columns-repeated="3"/>
          <table:table-cell office:value-type="float" office:value="0.559081018251222" calcext:value-type="float">
            <text:p>0.559081018251222</text:p>
          </table:table-cell>
          <table:table-cell table:formula="of:=([.D46]^2*([.$B$8]-1))/SQRT(([.$B$8]*[.D46]^2-1)^2 + [.D46]^2*([.D46]^2-1)^2*([.$B$8]-1)^2*[.$B$3]^2)" office:value-type="float" office:value="2.19630715726283" calcext:value-type="float">
            <text:p>2.19630715726283</text:p>
          </table:table-cell>
        </table:table-row>
        <table:table-row table:style-name="ro1">
          <table:table-cell table:number-columns-repeated="3"/>
          <table:table-cell office:value-type="float" office:value="0.585702081805667" calcext:value-type="float">
            <text:p>0.585702081805667</text:p>
          </table:table-cell>
          <table:table-cell table:formula="of:=([.D47]^2*([.$B$8]-1))/SQRT(([.$B$8]*[.D47]^2-1)^2 + [.D47]^2*([.D47]^2-1)^2*([.$B$8]-1)^2*[.$B$3]^2)" office:value-type="float" office:value="2.02436207894144" calcext:value-type="float">
            <text:p>2.02436207894144</text:p>
          </table:table-cell>
        </table:table-row>
        <table:table-row table:style-name="ro1">
          <table:table-cell table:number-columns-repeated="3"/>
          <table:table-cell office:value-type="float" office:value="0.613590727341317" calcext:value-type="float">
            <text:p>0.613590727341317</text:p>
          </table:table-cell>
          <table:table-cell table:formula="of:=([.D48]^2*([.$B$8]-1))/SQRT(([.$B$8]*[.D48]^2-1)^2 + [.D48]^2*([.D48]^2-1)^2*([.$B$8]-1)^2*[.$B$3]^2)" office:value-type="float" office:value="1.8455019154035" calcext:value-type="float">
            <text:p>1.8455019154035</text:p>
          </table:table-cell>
        </table:table-row>
        <table:table-row table:style-name="ro1">
          <table:table-cell table:number-columns-repeated="3"/>
          <table:table-cell office:value-type="float" office:value="0.642807311728432" calcext:value-type="float">
            <text:p>0.642807311728432</text:p>
          </table:table-cell>
          <table:table-cell table:formula="of:=([.D49]^2*([.$B$8]-1))/SQRT(([.$B$8]*[.D49]^2-1)^2 + [.D49]^2*([.D49]^2-1)^2*([.$B$8]-1)^2*[.$B$3]^2)" office:value-type="float" office:value="1.68470439573623" calcext:value-type="float">
            <text:p>1.68470439573623</text:p>
          </table:table-cell>
        </table:table-row>
        <table:table-row table:style-name="ro1">
          <table:table-cell table:number-columns-repeated="3"/>
          <table:table-cell office:value-type="float" office:value="0.673415065775082" calcext:value-type="float">
            <text:p>0.673415065775082</text:p>
          </table:table-cell>
          <table:table-cell table:formula="of:=([.D50]^2*([.$B$8]-1))/SQRT(([.$B$8]*[.D50]^2-1)^2 + [.D50]^2*([.D50]^2-1)^2*([.$B$8]-1)^2*[.$B$3]^2)" office:value-type="float" office:value="1.54815400506271" calcext:value-type="float">
            <text:p>1.54815400506271</text:p>
          </table:table-cell>
        </table:table-row>
        <table:table-row table:style-name="ro1">
          <table:table-cell table:number-columns-repeated="3"/>
          <table:table-cell office:value-type="float" office:value="0.705480231071864" calcext:value-type="float">
            <text:p>0.705480231071864</text:p>
          </table:table-cell>
          <table:table-cell table:formula="of:=([.D51]^2*([.$B$8]-1))/SQRT(([.$B$8]*[.D51]^2-1)^2 + [.D51]^2*([.D51]^2-1)^2*([.$B$8]-1)^2*[.$B$3]^2)" office:value-type="float" office:value="1.43447584759384" calcext:value-type="float">
            <text:p>1.43447584759384</text:p>
          </table:table-cell>
        </table:table-row>
        <table:table-row table:style-name="ro1">
          <table:table-cell table:number-columns-repeated="3"/>
          <table:table-cell office:value-type="float" office:value="0.739072203352578" calcext:value-type="float">
            <text:p>0.739072203352578</text:p>
          </table:table-cell>
          <table:table-cell table:formula="of:=([.D52]^2*([.$B$8]-1))/SQRT(([.$B$8]*[.D52]^2-1)^2 + [.D52]^2*([.D52]^2-1)^2*([.$B$8]-1)^2*[.$B$3]^2)" office:value-type="float" office:value="1.34016221445857" calcext:value-type="float">
            <text:p>1.34016221445857</text:p>
          </table:table-cell>
        </table:table-row>
        <table:table-row table:style-name="ro1">
          <table:table-cell table:number-columns-repeated="3"/>
          <table:table-cell office:value-type="float" office:value="0.774263682681127" calcext:value-type="float">
            <text:p>0.774263682681127</text:p>
          </table:table-cell>
          <table:table-cell table:formula="of:=([.D53]^2*([.$B$8]-1))/SQRT(([.$B$8]*[.D53]^2-1)^2 + [.D53]^2*([.D53]^2-1)^2*([.$B$8]-1)^2*[.$B$3]^2)" office:value-type="float" office:value="1.26160731161728" calcext:value-type="float">
            <text:p>1.26160731161728</text:p>
          </table:table-cell>
        </table:table-row>
        <table:table-row table:style-name="ro1">
          <table:table-cell table:number-columns-repeated="3"/>
          <table:table-cell office:value-type="float" office:value="0.811130830789687" calcext:value-type="float">
            <text:p>0.811130830789687</text:p>
          </table:table-cell>
          <table:table-cell table:formula="of:=([.D54]^2*([.$B$8]-1))/SQRT(([.$B$8]*[.D54]^2-1)^2 + [.D54]^2*([.D54]^2-1)^2*([.$B$8]-1)^2*[.$B$3]^2)" office:value-type="float" office:value="1.19571316820432" calcext:value-type="float">
            <text:p>1.19571316820432</text:p>
          </table:table-cell>
        </table:table-row>
        <table:table-row table:style-name="ro1">
          <table:table-cell table:number-columns-repeated="3"/>
          <table:table-cell office:value-type="float" office:value="0.849753435908644" calcext:value-type="float">
            <text:p>0.849753435908644</text:p>
          </table:table-cell>
          <table:table-cell table:formula="of:=([.D55]^2*([.$B$8]-1))/SQRT(([.$B$8]*[.D55]^2-1)^2 + [.D55]^2*([.D55]^2-1)^2*([.$B$8]-1)^2*[.$B$3]^2)" office:value-type="float" office:value="1.13997900993206" calcext:value-type="float">
            <text:p>1.13997900993206</text:p>
          </table:table-cell>
        </table:table-row>
        <table:table-row table:style-name="ro1">
          <table:table-cell table:number-columns-repeated="3"/>
          <table:table-cell office:value-type="float" office:value="0.890215085445039" calcext:value-type="float">
            <text:p>0.890215085445039</text:p>
          </table:table-cell>
          <table:table-cell table:formula="of:=([.D56]^2*([.$B$8]-1))/SQRT(([.$B$8]*[.D56]^2-1)^2 + [.D56]^2*([.D56]^2-1)^2*([.$B$8]-1)^2*[.$B$3]^2)" office:value-type="float" office:value="1.0924310352398" calcext:value-type="float">
            <text:p>1.0924310352398</text:p>
          </table:table-cell>
        </table:table-row>
        <table:table-row table:style-name="ro1">
          <table:table-cell table:number-columns-repeated="3"/>
          <table:table-cell office:value-type="float" office:value="0.93260334688322" calcext:value-type="float">
            <text:p>0.93260334688322</text:p>
          </table:table-cell>
          <table:table-cell table:formula="of:=([.D57]^2*([.$B$8]-1))/SQRT(([.$B$8]*[.D57]^2-1)^2 + [.D57]^2*([.D57]^2-1)^2*([.$B$8]-1)^2*[.$B$3]^2)" office:value-type="float" office:value="1.05151979897039" calcext:value-type="float">
            <text:p>1.05151979897039</text:p>
          </table:table-cell>
        </table:table-row>
        <table:table-row table:style-name="ro1">
          <table:table-cell table:number-columns-repeated="3"/>
          <table:table-cell office:value-type="float" office:value="0.977009957299225" calcext:value-type="float">
            <text:p>0.977009957299225</text:p>
          </table:table-cell>
          <table:table-cell table:formula="of:=([.D58]^2*([.$B$8]-1))/SQRT(([.$B$8]*[.D58]^2-1)^2 + [.D58]^2*([.D58]^2-1)^2*([.$B$8]-1)^2*[.$B$3]^2)" office:value-type="float" office:value="1.01602573578849" calcext:value-type="float">
            <text:p>1.01602573578849</text:p>
          </table:table-cell>
        </table:table-row>
        <table:table-row table:style-name="ro1">
          <table:table-cell table:number-columns-repeated="3"/>
          <table:table-cell office:value-type="float" office:value="1.02353102189903" calcext:value-type="float">
            <text:p>1.02353102189903</text:p>
          </table:table-cell>
          <table:table-cell table:formula="of:=([.D59]^2*([.$B$8]-1))/SQRT(([.$B$8]*[.D59]^2-1)^2 + [.D59]^2*([.D59]^2-1)^2*([.$B$8]-1)^2*[.$B$3]^2)" office:value-type="float" office:value="0.984982517376088" calcext:value-type="float">
            <text:p>0.984982517376088</text:p>
          </table:table-cell>
        </table:table-row>
        <table:table-row table:style-name="ro1">
          <table:table-cell table:number-columns-repeated="3"/>
          <table:table-cell office:value-type="float" office:value="1.07226722201032" calcext:value-type="float">
            <text:p>1.07226722201032</text:p>
          </table:table-cell>
          <table:table-cell table:formula="of:=([.D60]^2*([.$B$8]-1))/SQRT(([.$B$8]*[.D60]^2-1)^2 + [.D60]^2*([.D60]^2-1)^2*([.$B$8]-1)^2*[.$B$3]^2)" office:value-type="float" office:value="0.957617839823514" calcext:value-type="float">
            <text:p>0.957617839823514</text:p>
          </table:table-cell>
        </table:table-row>
        <table:table-row table:style-name="ro1">
          <table:table-cell table:number-columns-repeated="3"/>
          <table:table-cell office:value-type="float" office:value="1.12332403297803" calcext:value-type="float">
            <text:p>1.12332403297803</text:p>
          </table:table-cell>
          <table:table-cell table:formula="of:=([.D61]^2*([.$B$8]-1))/SQRT(([.$B$8]*[.D61]^2-1)^2 + [.D61]^2*([.D61]^2-1)^2*([.$B$8]-1)^2*[.$B$3]^2)" office:value-type="float" office:value="0.933308558044147" calcext:value-type="float">
            <text:p>0.933308558044147</text:p>
          </table:table-cell>
        </table:table-row>
        <table:table-row table:style-name="ro1">
          <table:table-cell table:number-columns-repeated="3"/>
          <table:table-cell office:value-type="float" office:value="1.176811952435" calcext:value-type="float">
            <text:p>1.176811952435</text:p>
          </table:table-cell>
          <table:table-cell table:formula="of:=([.D62]^2*([.$B$8]-1))/SQRT(([.$B$8]*[.D62]^2-1)^2 + [.D62]^2*([.D62]^2-1)^2*([.$B$8]-1)^2*[.$B$3]^2)" office:value-type="float" office:value="0.911546893825399" calcext:value-type="float">
            <text:p>0.911546893825399</text:p>
          </table:table-cell>
        </table:table-row>
        <table:table-row table:style-name="ro1">
          <table:table-cell table:number-columns-repeated="3"/>
          <table:table-cell office:value-type="float" office:value="1.23284673944207" calcext:value-type="float">
            <text:p>1.23284673944207</text:p>
          </table:table-cell>
          <table:table-cell table:formula="of:=([.D63]^2*([.$B$8]-1))/SQRT(([.$B$8]*[.D63]^2-1)^2 + [.D63]^2*([.D63]^2-1)^2*([.$B$8]-1)^2*[.$B$3]^2)" office:value-type="float" office:value="0.891914965156981" calcext:value-type="float">
            <text:p>0.891914965156981</text:p>
          </table:table-cell>
        </table:table-row>
        <table:table-row table:style-name="ro1">
          <table:table-cell table:number-columns-repeated="3"/>
          <table:table-cell office:value-type="float" office:value="1.29154966501488" calcext:value-type="float">
            <text:p>1.29154966501488</text:p>
          </table:table-cell>
          <table:table-cell table:formula="of:=([.D64]^2*([.$B$8]-1))/SQRT(([.$B$8]*[.D64]^2-1)^2 + [.D64]^2*([.D64]^2-1)^2*([.$B$8]-1)^2*[.$B$3]^2)" office:value-type="float" office:value="0.874065506635741" calcext:value-type="float">
            <text:p>0.874065506635741</text:p>
          </table:table-cell>
        </table:table-row>
        <table:table-row table:style-name="ro1">
          <table:table-cell table:number-columns-repeated="3"/>
          <table:table-cell office:value-type="float" office:value="1.35304777457981" calcext:value-type="float">
            <text:p>1.35304777457981</text:p>
          </table:table-cell>
          <table:table-cell table:formula="of:=([.D65]^2*([.$B$8]-1))/SQRT(([.$B$8]*[.D65]^2-1)^2 + [.D65]^2*([.D65]^2-1)^2*([.$B$8]-1)^2*[.$B$3]^2)" office:value-type="float" office:value="0.857707189667733" calcext:value-type="float">
            <text:p>0.857707189667733</text:p>
          </table:table-cell>
        </table:table-row>
        <table:table-row table:style-name="ro1">
          <table:table-cell table:number-columns-repeated="3"/>
          <table:table-cell office:value-type="float" office:value="1.41747416292681" calcext:value-type="float">
            <text:p>1.41747416292681</text:p>
          </table:table-cell>
          <table:table-cell table:formula="of:=([.D66]^2*([.$B$8]-1))/SQRT(([.$B$8]*[.D66]^2-1)^2 + [.D66]^2*([.D66]^2-1)^2*([.$B$8]-1)^2*[.$B$3]^2)" office:value-type="float" office:value="0.842593371548838" calcext:value-type="float">
            <text:p>0.842593371548838</text:p>
          </table:table-cell>
        </table:table-row>
        <table:table-row table:style-name="ro1">
          <table:table-cell table:number-columns-repeated="3"/>
          <table:table-cell office:value-type="float" office:value="1.48496826225447" calcext:value-type="float">
            <text:p>1.48496826225447</text:p>
          </table:table-cell>
          <table:table-cell table:formula="of:=([.D67]^2*([.$B$8]-1))/SQRT(([.$B$8]*[.D67]^2-1)^2 + [.D67]^2*([.D67]^2-1)^2*([.$B$8]-1)^2*[.$B$3]^2)" office:value-type="float" office:value="0.828513416062358" calcext:value-type="float">
            <text:p>0.828513416062358</text:p>
          </table:table-cell>
        </table:table-row>
        <table:table-row table:style-name="ro1">
          <table:table-cell table:number-columns-repeated="3"/>
          <table:table-cell office:value-type="float" office:value="1.55567614393047" calcext:value-type="float">
            <text:p>1.55567614393047</text:p>
          </table:table-cell>
          <table:table-cell table:formula="of:=([.D68]^2*([.$B$8]-1))/SQRT(([.$B$8]*[.D68]^2-1)^2 + [.D68]^2*([.D68]^2-1)^2*([.$B$8]-1)^2*[.$B$3]^2)" office:value-type="float" office:value="0.815285957472161" calcext:value-type="float">
            <text:p>0.815285957472161</text:p>
          </table:table-cell>
        </table:table-row>
        <table:table-row table:style-name="ro1">
          <table:table-cell table:number-columns-repeated="3"/>
          <table:table-cell office:value-type="float" office:value="1.62975083462064" calcext:value-type="float">
            <text:p>1.62975083462064</text:p>
          </table:table-cell>
          <table:table-cell table:formula="of:=([.D69]^2*([.$B$8]-1))/SQRT(([.$B$8]*[.D69]^2-1)^2 + [.D69]^2*([.D69]^2-1)^2*([.$B$8]-1)^2*[.$B$3]^2)" office:value-type="float" office:value="0.802753646020151" calcext:value-type="float">
            <text:p>0.802753646020151</text:p>
          </table:table-cell>
        </table:table-row>
        <table:table-row table:style-name="ro1">
          <table:table-cell table:number-columns-repeated="3"/>
          <table:table-cell office:value-type="float" office:value="1.70735264747069" calcext:value-type="float">
            <text:p>1.70735264747069</text:p>
          </table:table-cell>
          <table:table-cell table:formula="of:=([.D70]^2*([.$B$8]-1))/SQRT(([.$B$8]*[.D70]^2-1)^2 + [.D70]^2*([.D70]^2-1)^2*([.$B$8]-1)^2*[.$B$3]^2)" office:value-type="float" office:value="0.790779033335985" calcext:value-type="float">
            <text:p>0.790779033335985</text:p>
          </table:table-cell>
        </table:table-row>
        <table:table-row table:style-name="ro1">
          <table:table-cell table:number-columns-repeated="3"/>
          <table:table-cell office:value-type="float" office:value="1.78864952905744" calcext:value-type="float">
            <text:p>1.78864952905744</text:p>
          </table:table-cell>
          <table:table-cell table:formula="of:=([.D71]^2*([.$B$8]-1))/SQRT(([.$B$8]*[.D71]^2-1)^2 + [.D71]^2*([.D71]^2-1)^2*([.$B$8]-1)^2*[.$B$3]^2)" office:value-type="float" office:value="0.779241343330247" calcext:value-type="float">
            <text:p>0.779241343330247</text:p>
          </table:table-cell>
        </table:table-row>
        <table:table-row table:style-name="ro1">
          <table:table-cell table:number-columns-repeated="3"/>
          <table:table-cell office:value-type="float" office:value="1.87381742286038" calcext:value-type="float">
            <text:p>1.87381742286038</text:p>
          </table:table-cell>
          <table:table-cell table:formula="of:=([.D72]^2*([.$B$8]-1))/SQRT(([.$B$8]*[.D72]^2-1)^2 + [.D72]^2*([.D72]^2-1)^2*([.$B$8]-1)^2*[.$B$3]^2)" office:value-type="float" office:value="0.768033937459897" calcext:value-type="float">
            <text:p>0.768033937459897</text:p>
          </table:table-cell>
        </table:table-row>
        <table:table-row table:style-name="ro1">
          <table:table-cell table:number-columns-repeated="3"/>
          <table:table-cell office:value-type="float" office:value="1.96304065004027" calcext:value-type="float">
            <text:p>1.96304065004027</text:p>
          </table:table-cell>
          <table:table-cell table:formula="of:=([.D73]^2*([.$B$8]-1))/SQRT(([.$B$8]*[.D73]^2-1)^2 + [.D73]^2*([.D73]^2-1)^2*([.$B$8]-1)^2*[.$B$3]^2)" office:value-type="float" office:value="0.757062329376188" calcext:value-type="float">
            <text:p>0.757062329376188</text:p>
          </table:table-cell>
        </table:table-row>
        <table:table-row table:style-name="ro1">
          <table:table-cell table:number-columns-repeated="3"/>
          <table:table-cell office:value-type="float" office:value="2.05651230834865" calcext:value-type="float">
            <text:p>2.05651230834865</text:p>
          </table:table-cell>
          <table:table-cell table:formula="of:=([.D74]^2*([.$B$8]-1))/SQRT(([.$B$8]*[.D74]^2-1)^2 + [.D74]^2*([.D74]^2-1)^2*([.$B$8]-1)^2*[.$B$3]^2)" office:value-type="float" office:value="0.746242637626552" calcext:value-type="float">
            <text:p>0.746242637626552</text:p>
          </table:table-cell>
        </table:table-row>
        <table:table-row table:style-name="ro1">
          <table:table-cell table:number-columns-repeated="3"/>
          <table:table-cell office:value-type="float" office:value="2.15443469003188" calcext:value-type="float">
            <text:p>2.15443469003188</text:p>
          </table:table-cell>
          <table:table-cell table:formula="of:=([.D75]^2*([.$B$8]-1))/SQRT(([.$B$8]*[.D75]^2-1)^2 + [.D75]^2*([.D75]^2-1)^2*([.$B$8]-1)^2*[.$B$3]^2)" office:value-type="float" office:value="0.735500389661369" calcext:value-type="float">
            <text:p>0.735500389661369</text:p>
          </table:table-cell>
        </table:table-row>
        <table:table-row table:style-name="ro1">
          <table:table-cell table:number-columns-repeated="3"/>
          <table:table-cell office:value-type="float" office:value="2.25701971963392" calcext:value-type="float">
            <text:p>2.25701971963392</text:p>
          </table:table-cell>
          <table:table-cell table:formula="of:=([.D76]^2*([.$B$8]-1))/SQRT(([.$B$8]*[.D76]^2-1)^2 + [.D76]^2*([.D76]^2-1)^2*([.$B$8]-1)^2*[.$B$3]^2)" office:value-type="float" office:value="0.72476960831905" calcext:value-type="float">
            <text:p>0.72476960831905</text:p>
          </table:table-cell>
        </table:table-row>
        <table:table-row table:style-name="ro1">
          <table:table-cell table:number-columns-repeated="3"/>
          <table:table-cell office:value-type="float" office:value="2.36448941264541" calcext:value-type="float">
            <text:p>2.36448941264541</text:p>
          </table:table-cell>
          <table:table-cell table:formula="of:=([.D77]^2*([.$B$8]-1))/SQRT(([.$B$8]*[.D77]^2-1)^2 + [.D77]^2*([.D77]^2-1)^2*([.$B$8]-1)^2*[.$B$3]^2)" office:value-type="float" office:value="0.713992124989251" calcext:value-type="float">
            <text:p>0.713992124989251</text:p>
          </table:table-cell>
        </table:table-row>
        <table:table-row table:style-name="ro1">
          <table:table-cell table:number-columns-repeated="3"/>
          <table:table-cell office:value-type="float" office:value="2.47707635599171" calcext:value-type="float">
            <text:p>2.47707635599171</text:p>
          </table:table-cell>
          <table:table-cell table:formula="of:=([.D78]^2*([.$B$8]-1))/SQRT(([.$B$8]*[.D78]^2-1)^2 + [.D78]^2*([.D78]^2-1)^2*([.$B$8]-1)^2*[.$B$3]^2)" office:value-type="float" office:value="0.703117073084569" calcext:value-type="float">
            <text:p>0.703117073084569</text:p>
          </table:table-cell>
        </table:table-row>
        <table:table-row table:style-name="ro1">
          <table:table-cell table:number-columns-repeated="3"/>
          <table:table-cell office:value-type="float" office:value="2.59502421139974" calcext:value-type="float">
            <text:p>2.59502421139974</text:p>
          </table:table-cell>
          <table:table-cell table:formula="of:=([.D79]^2*([.$B$8]-1))/SQRT(([.$B$8]*[.D79]^2-1)^2 + [.D79]^2*([.D79]^2-1)^2*([.$B$8]-1)^2*[.$B$3]^2)" office:value-type="float" office:value="0.69210052226705" calcext:value-type="float">
            <text:p>0.69210052226705</text:p>
          </table:table-cell>
        </table:table-row>
        <table:table-row table:style-name="ro1">
          <table:table-cell table:number-columns-repeated="3"/>
          <table:table-cell office:value-type="float" office:value="2.71858824273294" calcext:value-type="float">
            <text:p>2.71858824273294</text:p>
          </table:table-cell>
          <table:table-cell table:formula="of:=([.D80]^2*([.$B$8]-1))/SQRT(([.$B$8]*[.D80]^2-1)^2 + [.D80]^2*([.D80]^2-1)^2*([.$B$8]-1)^2*[.$B$3]^2)" office:value-type="float" office:value="0.680905218837493" calcext:value-type="float">
            <text:p>0.680905218837493</text:p>
          </table:table-cell>
        </table:table-row>
        <table:table-row table:style-name="ro1">
          <table:table-cell table:number-columns-repeated="3"/>
          <table:table-cell office:value-type="float" office:value="2.8480358684358" calcext:value-type="float">
            <text:p>2.8480358684358</text:p>
          </table:table-cell>
          <table:table-cell table:formula="of:=([.D81]^2*([.$B$8]-1))/SQRT(([.$B$8]*[.D81]^2-1)^2 + [.D81]^2*([.D81]^2-1)^2*([.$B$8]-1)^2*[.$B$3]^2)" office:value-type="float" office:value="0.669500401406914" calcext:value-type="float">
            <text:p>0.669500401406914</text:p>
          </table:table-cell>
        </table:table-row>
        <table:table-row table:style-name="ro1">
          <table:table-cell table:number-columns-repeated="3"/>
          <table:table-cell office:value-type="float" office:value="2.98364724028334" calcext:value-type="float">
            <text:p>2.98364724028334</text:p>
          </table:table-cell>
          <table:table-cell table:formula="of:=([.D82]^2*([.$B$8]-1))/SQRT(([.$B$8]*[.D82]^2-1)^2 + [.D82]^2*([.D82]^2-1)^2*([.$B$8]-1)^2*[.$B$3]^2)" office:value-type="float" office:value="0.657861663919623" calcext:value-type="float">
            <text:p>0.657861663919623</text:p>
          </table:table-cell>
        </table:table-row>
        <table:table-row table:style-name="ro1">
          <table:table-cell table:number-columns-repeated="3"/>
          <table:table-cell office:value-type="float" office:value="3.12571584968824" calcext:value-type="float">
            <text:p>3.12571584968824</text:p>
          </table:table-cell>
          <table:table-cell table:formula="of:=([.D83]^2*([.$B$8]-1))/SQRT(([.$B$8]*[.D83]^2-1)^2 + [.D83]^2*([.D83]^2-1)^2*([.$B$8]-1)^2*[.$B$3]^2)" office:value-type="float" office:value="0.645970840684209" calcext:value-type="float">
            <text:p>0.645970840684209</text:p>
          </table:table-cell>
        </table:table-row>
        <table:table-row table:style-name="ro1">
          <table:table-cell table:number-columns-repeated="3"/>
          <table:table-cell office:value-type="float" office:value="3.27454916287773" calcext:value-type="float">
            <text:p>3.27454916287773</text:p>
          </table:table-cell>
          <table:table-cell table:formula="of:=([.D84]^2*([.$B$8]-1))/SQRT(([.$B$8]*[.D84]^2-1)^2 + [.D84]^2*([.D84]^2-1)^2*([.$B$8]-1)^2*[.$B$3]^2)" office:value-type="float" office:value="0.633815890609408" calcext:value-type="float">
            <text:p>0.633815890609408</text:p>
          </table:table-cell>
        </table:table-row>
        <table:table-row table:style-name="ro1">
          <table:table-cell table:number-columns-repeated="3"/>
          <table:table-cell office:value-type="float" office:value="3.43046928631492" calcext:value-type="float">
            <text:p>3.43046928631492</text:p>
          </table:table-cell>
          <table:table-cell table:formula="of:=([.D85]^2*([.$B$8]-1))/SQRT(([.$B$8]*[.D85]^2-1)^2 + [.D85]^2*([.D85]^2-1)^2*([.$B$8]-1)^2*[.$B$3]^2)" office:value-type="float" office:value="0.621390760575552" calcext:value-type="float">
            <text:p>0.621390760575552</text:p>
          </table:table-cell>
        </table:table-row>
        <table:table-row table:style-name="ro1">
          <table:table-cell table:number-columns-repeated="3"/>
          <table:table-cell office:value-type="float" office:value="3.59381366380463" calcext:value-type="float">
            <text:p>3.59381366380463</text:p>
          </table:table-cell>
          <table:table-cell table:formula="of:=([.D86]^2*([.$B$8]-1))/SQRT(([.$B$8]*[.D86]^2-1)^2 + [.D86]^2*([.D86]^2-1)^2*([.$B$8]-1)^2*[.$B$3]^2)" office:value-type="float" office:value="0.608695210956977" calcext:value-type="float">
            <text:p>0.608695210956977</text:p>
          </table:table-cell>
        </table:table-row>
        <table:table-row table:style-name="ro1">
          <table:table-cell table:number-columns-repeated="3"/>
          <table:table-cell office:value-type="float" office:value="3.76493580679247" calcext:value-type="float">
            <text:p>3.76493580679247</text:p>
          </table:table-cell>
          <table:table-cell table:formula="of:=([.D87]^2*([.$B$8]-1))/SQRT(([.$B$8]*[.D87]^2-1)^2 + [.D87]^2*([.D87]^2-1)^2*([.$B$8]-1)^2*[.$B$3]^2)" office:value-type="float" office:value="0.595734589820187" calcext:value-type="float">
            <text:p>0.595734589820187</text:p>
          </table:table-cell>
        </table:table-row>
        <table:table-row table:style-name="ro1">
          <table:table-cell table:number-columns-repeated="3"/>
          <table:table-cell office:value-type="float" office:value="3.94420605943766" calcext:value-type="float">
            <text:p>3.94420605943766</text:p>
          </table:table-cell>
          <table:table-cell table:formula="of:=([.D88]^2*([.$B$8]-1))/SQRT(([.$B$8]*[.D88]^2-1)^2 + [.D88]^2*([.D88]^2-1)^2*([.$B$8]-1)^2*[.$B$3]^2)" office:value-type="float" office:value="0.582519546244932" calcext:value-type="float">
            <text:p>0.582519546244932</text:p>
          </table:table-cell>
        </table:table-row>
        <table:table-row table:style-name="ro1">
          <table:table-cell table:number-columns-repeated="3"/>
          <table:table-cell office:value-type="float" office:value="4.13201240011534" calcext:value-type="float">
            <text:p>4.13201240011534</text:p>
          </table:table-cell>
          <table:table-cell table:formula="of:=([.D89]^2*([.$B$8]-1))/SQRT(([.$B$8]*[.D89]^2-1)^2 + [.D89]^2*([.D89]^2-1)^2*([.$B$8]-1)^2*[.$B$3]^2)" office:value-type="float" office:value="0.569065677457536" calcext:value-type="float">
            <text:p>0.569065677457536</text:p>
          </table:table-cell>
        </table:table-row>
        <table:table-row table:style-name="ro1">
          <table:table-cell table:number-columns-repeated="3"/>
          <table:table-cell office:value-type="float" office:value="4.32876128108306" calcext:value-type="float">
            <text:p>4.32876128108306</text:p>
          </table:table-cell>
          <table:table-cell table:formula="of:=([.D90]^2*([.$B$8]-1))/SQRT(([.$B$8]*[.D90]^2-1)^2 + [.D90]^2*([.D90]^2-1)^2*([.$B$8]-1)^2*[.$B$3]^2)" office:value-type="float" office:value="0.555393108864448" calcext:value-type="float">
            <text:p>0.555393108864448</text:p>
          </table:table-cell>
        </table:table-row>
        <table:table-row table:style-name="ro1">
          <table:table-cell table:number-columns-repeated="3"/>
          <table:table-cell office:value-type="float" office:value="4.53487850812858" calcext:value-type="float">
            <text:p>4.53487850812858</text:p>
          </table:table-cell>
          <table:table-cell table:formula="of:=([.D91]^2*([.$B$8]-1))/SQRT(([.$B$8]*[.D91]^2-1)^2 + [.D91]^2*([.D91]^2-1)^2*([.$B$8]-1)^2*[.$B$3]^2)" office:value-type="float" office:value="0.541526010413957" calcext:value-type="float">
            <text:p>0.541526010413957</text:p>
          </table:table-cell>
        </table:table-row>
        <table:table-row table:style-name="ro1">
          <table:table-cell table:number-columns-repeated="3"/>
          <table:table-cell office:value-type="float" office:value="4.7508101621028" calcext:value-type="float">
            <text:p>4.7508101621028</text:p>
          </table:table-cell>
          <table:table-cell table:formula="of:=([.D92]^2*([.$B$8]-1))/SQRT(([.$B$8]*[.D92]^2-1)^2 + [.D92]^2*([.D92]^2-1)^2*([.$B$8]-1)^2*[.$B$3]^2)" office:value-type="float" office:value="0.527492056753051" calcext:value-type="float">
            <text:p>0.527492056753051</text:p>
          </table:table-cell>
        </table:table-row>
        <table:table-row table:style-name="ro1">
          <table:table-cell table:number-columns-repeated="3"/>
          <table:table-cell office:value-type="float" office:value="4.97702356433211" calcext:value-type="float">
            <text:p>4.97702356433211</text:p>
          </table:table-cell>
          <table:table-cell table:formula="of:=([.D93]^2*([.$B$8]-1))/SQRT(([.$B$8]*[.D93]^2-1)^2 + [.D93]^2*([.D93]^2-1)^2*([.$B$8]-1)^2*[.$B$3]^2)" office:value-type="float" office:value="0.513321842143363" calcext:value-type="float">
            <text:p>0.513321842143363</text:p>
          </table:table-cell>
        </table:table-row>
        <table:table-row table:style-name="ro1">
          <table:table-cell table:number-columns-repeated="3"/>
          <table:table-cell office:value-type="float" office:value="5.21400828799968" calcext:value-type="float">
            <text:p>5.21400828799968</text:p>
          </table:table-cell>
          <table:table-cell table:formula="of:=([.D94]^2*([.$B$8]-1))/SQRT(([.$B$8]*[.D94]^2-1)^2 + [.D94]^2*([.D94]^2-1)^2*([.$B$8]-1)^2*[.$B$3]^2)" office:value-type="float" office:value="0.499048263843831" calcext:value-type="float">
            <text:p>0.499048263843831</text:p>
          </table:table-cell>
        </table:table-row>
        <table:table-row table:style-name="ro1">
          <table:table-cell table:number-columns-repeated="3"/>
          <table:table-cell office:value-type="float" office:value="5.46227721768434" calcext:value-type="float">
            <text:p>5.46227721768434</text:p>
          </table:table-cell>
          <table:table-cell table:formula="of:=([.D95]^2*([.$B$8]-1))/SQRT(([.$B$8]*[.D95]^2-1)^2 + [.D95]^2*([.D95]^2-1)^2*([.$B$8]-1)^2*[.$B$3]^2)" office:value-type="float" office:value="0.48470588950132" calcext:value-type="float">
            <text:p>0.48470588950132</text:p>
          </table:table-cell>
        </table:table-row>
        <table:table-row table:style-name="ro1">
          <table:table-cell table:number-columns-repeated="3"/>
          <table:table-cell office:value-type="float" office:value="5.72236765935022" calcext:value-type="float">
            <text:p>5.72236765935022</text:p>
          </table:table-cell>
          <table:table-cell table:formula="of:=([.D96]^2*([.$B$8]-1))/SQRT(([.$B$8]*[.D96]^2-1)^2 + [.D96]^2*([.D96]^2-1)^2*([.$B$8]-1)^2*[.$B$3]^2)" office:value-type="float" office:value="0.470330324929734" calcext:value-type="float">
            <text:p>0.470330324929734</text:p>
          </table:table-cell>
        </table:table-row>
        <table:table-row table:style-name="ro1">
          <table:table-cell table:number-columns-repeated="3"/>
          <table:table-cell office:value-type="float" office:value="5.99484250318941" calcext:value-type="float">
            <text:p>5.99484250318941</text:p>
          </table:table-cell>
          <table:table-cell table:formula="of:=([.D97]^2*([.$B$8]-1))/SQRT(([.$B$8]*[.D97]^2-1)^2 + [.D97]^2*([.D97]^2-1)^2*([.$B$8]-1)^2*[.$B$3]^2)" office:value-type="float" office:value="0.455957598499497" calcext:value-type="float">
            <text:p>0.455957598499497</text:p>
          </table:table-cell>
        </table:table-row>
        <table:table-row table:style-name="ro1">
          <table:table-cell table:number-columns-repeated="3"/>
          <table:table-cell office:value-type="float" office:value="6.28029144183425" calcext:value-type="float">
            <text:p>6.28029144183425</text:p>
          </table:table-cell>
          <table:table-cell table:formula="of:=([.D98]^2*([.$B$8]-1))/SQRT(([.$B$8]*[.D98]^2-1)^2 + [.D98]^2*([.D98]^2-1)^2*([.$B$8]-1)^2*[.$B$3]^2)" office:value-type="float" office:value="0.441623577277995" calcext:value-type="float">
            <text:p>0.441623577277995</text:p>
          </table:table-cell>
        </table:table-row>
        <table:table-row table:style-name="ro1">
          <table:table-cell table:number-columns-repeated="3"/>
          <table:table-cell office:value-type="float" office:value="6.57933224657568" calcext:value-type="float">
            <text:p>6.57933224657568</text:p>
          </table:table-cell>
          <table:table-cell table:formula="of:=([.D99]^2*([.$B$8]-1))/SQRT(([.$B$8]*[.D99]^2-1)^2 + [.D99]^2*([.D99]^2-1)^2*([.$B$8]-1)^2*[.$B$3]^2)" office:value-type="float" office:value="0.427363428200374" calcext:value-type="float">
            <text:p>0.427363428200374</text:p>
          </table:table-cell>
        </table:table-row>
        <table:table-row table:style-name="ro1">
          <table:table-cell table:number-columns-repeated="3"/>
          <table:table-cell office:value-type="float" office:value="6.8926121043497" calcext:value-type="float">
            <text:p>6.8926121043497</text:p>
          </table:table-cell>
          <table:table-cell table:formula="of:=([.D100]^2*([.$B$8]-1))/SQRT(([.$B$8]*[.D100]^2-1)^2 + [.D100]^2*([.D100]^2-1)^2*([.$B$8]-1)^2*[.$B$3]^2)" office:value-type="float" office:value="0.413211135100804" calcext:value-type="float">
            <text:p>0.413211135100804</text:p>
          </table:table-cell>
        </table:table-row>
        <table:table-row table:style-name="ro1">
          <table:table-cell table:number-columns-repeated="3"/>
          <table:table-cell office:value-type="float" office:value="7.22080901838546" calcext:value-type="float">
            <text:p>7.22080901838546</text:p>
          </table:table-cell>
          <table:table-cell table:formula="of:=([.D101]^2*([.$B$8]-1))/SQRT(([.$B$8]*[.D101]^2-1)^2 + [.D101]^2*([.D101]^2-1)^2*([.$B$8]-1)^2*[.$B$3]^2)" office:value-type="float" office:value="0.399199079615408" calcext:value-type="float">
            <text:p>0.399199079615408</text:p>
          </table:table-cell>
        </table:table-row>
        <table:table-row table:style-name="ro1">
          <table:table-cell table:number-columns-repeated="3"/>
          <table:table-cell office:value-type="float" office:value="7.56463327554629" calcext:value-type="float">
            <text:p>7.56463327554629</text:p>
          </table:table-cell>
          <table:table-cell table:formula="of:=([.D102]^2*([.$B$8]-1))/SQRT(([.$B$8]*[.D102]^2-1)^2 + [.D102]^2*([.D102]^2-1)^2*([.$B$8]-1)^2*[.$B$3]^2)" office:value-type="float" office:value="0.385357691001363" calcext:value-type="float">
            <text:p>0.385357691001363</text:p>
          </table:table-cell>
        </table:table-row>
        <table:table-row table:style-name="ro1">
          <table:table-cell table:number-columns-repeated="3"/>
          <table:table-cell office:value-type="float" office:value="7.92482898353917" calcext:value-type="float">
            <text:p>7.92482898353917</text:p>
          </table:table-cell>
          <table:table-cell table:formula="of:=([.D103]^2*([.$B$8]-1))/SQRT(([.$B$8]*[.D103]^2-1)^2 + [.D103]^2*([.D103]^2-1)^2*([.$B$8]-1)^2*[.$B$3]^2)" office:value-type="float" office:value="0.371715167007132" calcext:value-type="float">
            <text:p>0.371715167007132</text:p>
          </table:table-cell>
        </table:table-row>
        <table:table-row table:style-name="ro1">
          <table:table-cell table:number-columns-repeated="3"/>
          <table:table-cell office:value-type="float" office:value="8.30217568131974" calcext:value-type="float">
            <text:p>8.30217568131974</text:p>
          </table:table-cell>
          <table:table-cell table:formula="of:=([.D104]^2*([.$B$8]-1))/SQRT(([.$B$8]*[.D104]^2-1)^2 + [.D104]^2*([.D104]^2-1)^2*([.$B$8]-1)^2*[.$B$3]^2)" office:value-type="float" office:value="0.35829726524827" calcext:value-type="float">
            <text:p>0.35829726524827</text:p>
          </table:table-cell>
        </table:table-row>
        <table:table-row table:style-name="ro1">
          <table:table-cell table:number-columns-repeated="3"/>
          <table:table-cell office:value-type="float" office:value="8.69749002617784" calcext:value-type="float">
            <text:p>8.69749002617784</text:p>
          </table:table-cell>
          <table:table-cell table:formula="of:=([.D105]^2*([.$B$8]-1))/SQRT(([.$B$8]*[.D105]^2-1)^2 + [.D105]^2*([.D105]^2-1)^2*([.$B$8]-1)^2*[.$B$3]^2)" office:value-type="float" office:value="0.34512716222096" calcext:value-type="float">
            <text:p>0.34512716222096</text:p>
          </table:table-cell>
        </table:table-row>
        <table:table-row table:style-name="ro1">
          <table:table-cell table:number-columns-repeated="3"/>
          <table:table-cell office:value-type="float" office:value="9.11162756115489" calcext:value-type="float">
            <text:p>9.11162756115489</text:p>
          </table:table-cell>
          <table:table-cell table:formula="of:=([.D106]^2*([.$B$8]-1))/SQRT(([.$B$8]*[.D106]^2-1)^2 + [.D106]^2*([.D106]^2-1)^2*([.$B$8]-1)^2*[.$B$3]^2)" office:value-type="float" office:value="0.332225375203692" calcext:value-type="float">
            <text:p>0.332225375203692</text:p>
          </table:table-cell>
        </table:table-row>
        <table:table-row table:style-name="ro1">
          <table:table-cell table:number-columns-repeated="3"/>
          <table:table-cell office:value-type="float" office:value="9.54548456661834" calcext:value-type="float">
            <text:p>9.54548456661834</text:p>
          </table:table-cell>
          <table:table-cell table:formula="of:=([.D107]^2*([.$B$8]-1))/SQRT(([.$B$8]*[.D107]^2-1)^2 + [.D107]^2*([.D107]^2-1)^2*([.$B$8]-1)^2*[.$B$3]^2)" office:value-type="float" office:value="0.319609740893663" calcext:value-type="float">
            <text:p>0.319609740893663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([.D108]^2*([.$B$8]-1))/SQRT(([.$B$8]*[.D108]^2-1)^2 + [.D108]^2*([.D108]^2-1)^2*([.$B$8]-1)^2*[.$B$3]^2)" office:value-type="float" office:value="0.307295443696322" calcext:value-type="float">
            <text:p>0.307295443696322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fxmin</text:p>
          </table:table-cell>
          <table:table-cell table:formula="of:=INDEX([.D9:.D108]; MATCH(MAX([.E9:.E108]); [.E9:.E108]; 0))" office:value-type="float" office:value="0.533669923120631" calcext:value-type="float">
            <text:p>0.53366992312063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tep 4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max</text:p>
          </table:table-cell>
          <table:table-cell table:formula="of:=([.B112]^2*([.$B$8]-1))/SQRT(([.$B$8]*[.B112]^2-1)^2 + [.B112]^2*([.B112]^2-1)^2*([.$B$8]-1)^2*[.$B$3]^2)" office:value-type="float" office:value="2.30517726447719" calcext:value-type="float">
            <text:p>2.30517726447719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tep 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ax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000032" calcext:value-type="float">
            <text:p>3.20E-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</text:p>
          </table:table-cell>
          <table:table-cell table:style-name="ce1" office:value-type="float" office:value="0.000000003" calcext:value-type="float">
            <text:p>3.00E-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</text:p>
          </table:table-cell>
          <table:table-cell table:style-name="ce1" office:value-type="float" office:value="0.00000108" calcext:value-type="float">
            <text:p>1.08E-0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cmin</text:p>
          </table:table-cell>
          <table:table-cell table:formula="of:=(8/PI())*(([.B122]^2)/([.B123]^2))*(([.B124]^2)/([.B125]))" office:value-type="float" office:value="50.9295817894065" calcext:value-type="float">
            <text:p>50.9295817894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max</text:p>
          </table:table-cell>
          <table:table-cell table:formula="of:=SQRT([.B127]/[.B128])/[.B131]" office:value-type="float" office:value="0.202788933798681" calcext:value-type="float">
            <text:p>0.202788933798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 (MHz)</text:p>
          </table:table-cell>
          <table:table-cell table:formula="of:=(1/(2*PI()*SQRT([.B127]*[.B128])))*10^-6" office:value-type="float" office:value="5.1367037005125" calcext:value-type="float">
            <text:p>5.1367037005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table:formula="of:=([.B127]+[.B129])/[.B127]" office:value-type="float" office:value="4.375" calcext:value-type="float">
            <text:p>4.37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7">00/00/0000</text:date>, <text:time style:data-style-name="N2" text:time-value="18:43:25.145683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5T08:49:28.761202600</meta:creation-date>
    <dc:date>2026-07-07T00:05:02.410448300</dc:date>
    <meta:editing-duration>P1DT5H12M44S</meta:editing-duration>
    <meta:editing-cycles>8</meta:editing-cycles>
    <meta:generator>LibreOffice/26.2.4.2$Windows_X86_64 LibreOffice_project/0229ac93fcf0d7cbc6376066c6f35021cef002dc</meta:generator>
    <meta:document-statistic meta:table-count="1" meta:cell-count="23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991cm" svg:height="9.004cm" xlink:href=".." xlink:type="simple" chart:class="chart:scatter" chart:style-name="ch1">
        <chart:legend chart:legend-position="end" svg:x="14.407cm" svg:y="4.2cm" style:legend-expansion="high" chart:style-name="ch2"/>
        <chart:plot-area chart:style-name="ch3" svg:x="1.32cm" svg:y="0.18cm" svg:width="12.768cm" svg:height="7.673cm">
          <chart:coordinate-region svg:x="1.571cm" svg:y="0.382cm" svg:width="12.315cm" svg:height="6.818cm"/>
          <chart:axis chart:dimension="x" chart:name="primary-x" chart:style-name="ch4" chartooo:axis-type="auto">
            <chart:title svg:x="5.882cm" svg:y="8.033cm" chart:style-name="ch5">
              <text:p><text:span text:style-name="T1">Normalized frequency Fx</text:span></text:p>
            </chart:title>
            <chart:categories table:cell-range-address="Sheet1.D9:Sheet1.D108"/>
            <chart:grid chart:style-name="ch6" chart:class="minor"/>
          </chart:axis>
          <chart:axis chart:dimension="y" chart:name="primary-y" chart:style-name="ch7">
            <chart:title svg:x="0.451cm" svg:y="4.409cm" chart:style-name="ch8">
              <text:p><text:span text:style-name="T1">Gain</text:span></text:p>
            </chart:title>
            <chart:grid chart:style-name="ch9" chart:class="major"/>
          </chart:axis>
          <chart:series chart:style-name="ch10" chart:values-cell-range-address="Sheet1.E9:Sheet1.E108" chart:label-cell-address="Sheet1.E8:Sheet1.E8" chart:class="chart:scatter">
            <chart:domain table:cell-range-address="Sheet1.D9:Sheet1.D108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K</text:p>
                <draw:g>
                  <svg:desc>Sheet1.E8:Sheet1.E8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1.D9:Sheet1.D108</svg:desc>
                </draw:g>
              </table:table-cell>
              <table:table-cell office:value-type="float" office:value="0.1">
                <text:p>0.1</text:p>
                <draw:g>
                  <svg:desc>Sheet1.D9:Sheet1.D108</svg:desc>
                </draw:g>
              </table:table-cell>
              <table:table-cell office:value-type="float" office:value="0.0311162671272858">
                <text:p>0.0311162671272858</text:p>
                <draw:g>
                  <svg:desc>Sheet1.E9:Sheet1.E108</svg:desc>
                </draw:g>
              </table:table-cell>
            </table:table-row>
            <table:table-row>
              <table:table-cell office:value-type="float" office:value="0.104761575278966">
                <text:p>0.104761575278966</text:p>
              </table:table-cell>
              <table:table-cell office:value-type="float" office:value="0.104761575278966">
                <text:p>0.104761575278966</text:p>
              </table:table-cell>
              <table:table-cell office:value-type="float" office:value="0.0342741026771124">
                <text:p>0.0342741026771124</text:p>
              </table:table-cell>
            </table:table-row>
            <table:table-row>
              <table:table-cell office:value-type="float" office:value="0.109749876549306">
                <text:p>0.109749876549306</text:p>
              </table:table-cell>
              <table:table-cell office:value-type="float" office:value="0.109749876549306">
                <text:p>0.109749876549306</text:p>
              </table:table-cell>
              <table:table-cell office:value-type="float" office:value="0.0377662600572139">
                <text:p>0.0377662600572139</text:p>
              </table:table-cell>
            </table:table-row>
            <table:table-row>
              <table:table-cell office:value-type="float" office:value="0.114975699539774">
                <text:p>0.114975699539774</text:p>
              </table:table-cell>
              <table:table-cell office:value-type="float" office:value="0.114975699539774">
                <text:p>0.114975699539774</text:p>
              </table:table-cell>
              <table:table-cell office:value-type="float" office:value="0.0416311009413899">
                <text:p>0.0416311009413899</text:p>
              </table:table-cell>
            </table:table-row>
            <table:table-row>
              <table:table-cell office:value-type="float" office:value="0.120450354025878">
                <text:p>0.120450354025878</text:p>
              </table:table-cell>
              <table:table-cell office:value-type="float" office:value="0.120450354025878">
                <text:p>0.120450354025878</text:p>
              </table:table-cell>
              <table:table-cell office:value-type="float" office:value="0.0459120288675821">
                <text:p>0.0459120288675821</text:p>
              </table:table-cell>
            </table:table-row>
            <table:table-row>
              <table:table-cell office:value-type="float" office:value="0.126185688306602">
                <text:p>0.126185688306602</text:p>
              </table:table-cell>
              <table:table-cell office:value-type="float" office:value="0.126185688306602">
                <text:p>0.126185688306602</text:p>
              </table:table-cell>
              <table:table-cell office:value-type="float" office:value="0.0506582897176557">
                <text:p>0.0506582897176557</text:p>
              </table:table-cell>
            </table:table-row>
            <table:table-row>
              <table:table-cell office:value-type="float" office:value="0.132194114846603">
                <text:p>0.132194114846603</text:p>
              </table:table-cell>
              <table:table-cell office:value-type="float" office:value="0.132194114846603">
                <text:p>0.132194114846603</text:p>
              </table:table-cell>
              <table:table-cell office:value-type="float" office:value="0.0559259287384546">
                <text:p>0.0559259287384546</text:p>
              </table:table-cell>
            </table:table-row>
            <table:table-row>
              <table:table-cell office:value-type="float" office:value="0.138488637139387">
                <text:p>0.138488637139387</text:p>
              </table:table-cell>
              <table:table-cell office:value-type="float" office:value="0.138488637139387">
                <text:p>0.138488637139387</text:p>
              </table:table-cell>
              <table:table-cell office:value-type="float" office:value="0.0617789411250949">
                <text:p>0.0617789411250949</text:p>
              </table:table-cell>
            </table:table-row>
            <table:table-row>
              <table:table-cell office:value-type="float" office:value="0.145082877849594">
                <text:p>0.145082877849594</text:p>
              </table:table-cell>
              <table:table-cell office:value-type="float" office:value="0.145082877849594">
                <text:p>0.145082877849594</text:p>
              </table:table-cell>
              <table:table-cell office:value-type="float" office:value="0.0682906634718461">
                <text:p>0.0682906634718461</text:p>
              </table:table-cell>
            </table:table-row>
            <table:table-row>
              <table:table-cell office:value-type="float" office:value="0.151991108295293">
                <text:p>0.151991108295293</text:p>
              </table:table-cell>
              <table:table-cell office:value-type="float" office:value="0.151991108295293">
                <text:p>0.151991108295293</text:p>
              </table:table-cell>
              <table:table-cell office:value-type="float" office:value="0.0755454669649405">
                <text:p>0.0755454669649405</text:p>
              </table:table-cell>
            </table:table-row>
            <table:table-row>
              <table:table-cell office:value-type="float" office:value="0.159228279334109">
                <text:p>0.159228279334109</text:p>
              </table:table-cell>
              <table:table-cell office:value-type="float" office:value="0.159228279334109">
                <text:p>0.159228279334109</text:p>
              </table:table-cell>
              <table:table-cell office:value-type="float" office:value="0.0836408312340607">
                <text:p>0.0836408312340607</text:p>
              </table:table-cell>
            </table:table-row>
            <table:table-row>
              <table:table-cell office:value-type="float" office:value="0.166810053720006">
                <text:p>0.166810053720006</text:p>
              </table:table-cell>
              <table:table-cell office:value-type="float" office:value="0.166810053720006">
                <text:p>0.166810053720006</text:p>
              </table:table-cell>
              <table:table-cell office:value-type="float" office:value="0.0926899019653648">
                <text:p>0.0926899019653648</text:p>
              </table:table-cell>
            </table:table-row>
            <table:table-row>
              <table:table-cell office:value-type="float" office:value="0.174752840000768">
                <text:p>0.174752840000768</text:p>
              </table:table-cell>
              <table:table-cell office:value-type="float" office:value="0.174752840000768">
                <text:p>0.174752840000768</text:p>
              </table:table-cell>
              <table:table-cell office:value-type="float" office:value="0.102824668075951">
                <text:p>0.102824668075951</text:p>
              </table:table-cell>
            </table:table-row>
            <table:table-row>
              <table:table-cell office:value-type="float" office:value="0.183073828029537">
                <text:p>0.183073828029537</text:p>
              </table:table-cell>
              <table:table-cell office:value-type="float" office:value="0.183073828029537">
                <text:p>0.183073828029537</text:p>
              </table:table-cell>
              <table:table-cell office:value-type="float" office:value="0.114199938841885">
                <text:p>0.114199938841885</text:p>
              </table:table-cell>
            </table:table-row>
            <table:table-row>
              <table:table-cell office:value-type="float" office:value="0.191791026167249">
                <text:p>0.191791026167249</text:p>
              </table:table-cell>
              <table:table-cell office:value-type="float" office:value="0.191791026167249">
                <text:p>0.191791026167249</text:p>
              </table:table-cell>
              <table:table-cell office:value-type="float" office:value="0.126998362739329">
                <text:p>0.126998362739329</text:p>
              </table:table-cell>
            </table:table-row>
            <table:table-row>
              <table:table-cell office:value-type="float" office:value="0.200923300256505">
                <text:p>0.200923300256505</text:p>
              </table:table-cell>
              <table:table-cell office:value-type="float" office:value="0.200923300256505">
                <text:p>0.200923300256505</text:p>
              </table:table-cell>
              <table:table-cell office:value-type="float" office:value="0.141436814996809">
                <text:p>0.141436814996809</text:p>
              </table:table-cell>
            </table:table-row>
            <table:table-row>
              <table:table-cell office:value-type="float" office:value="0.210490414451202">
                <text:p>0.210490414451202</text:p>
              </table:table-cell>
              <table:table-cell office:value-type="float" office:value="0.210490414451202">
                <text:p>0.210490414451202</text:p>
              </table:table-cell>
              <table:table-cell office:value-type="float" office:value="0.157774600363183">
                <text:p>0.157774600363183</text:p>
              </table:table-cell>
            </table:table-row>
            <table:table-row>
              <table:table-cell office:value-type="float" office:value="0.220513073990305">
                <text:p>0.220513073990305</text:p>
              </table:table-cell>
              <table:table-cell office:value-type="float" office:value="0.220513073990305">
                <text:p>0.220513073990305</text:p>
              </table:table-cell>
              <table:table-cell office:value-type="float" office:value="0.17632408670343">
                <text:p>0.17632408670343</text:p>
              </table:table-cell>
            </table:table-row>
            <table:table-row>
              <table:table-cell office:value-type="float" office:value="0.231012970008316">
                <text:p>0.231012970008316</text:p>
              </table:table-cell>
              <table:table-cell office:value-type="float" office:value="0.231012970008316">
                <text:p>0.231012970008316</text:p>
              </table:table-cell>
              <table:table-cell office:value-type="float" office:value="0.197464626452656">
                <text:p>0.197464626452656</text:p>
              </table:table-cell>
            </table:table-row>
            <table:table-row>
              <table:table-cell office:value-type="float" office:value="0.242012826479438">
                <text:p>0.242012826479438</text:p>
              </table:table-cell>
              <table:table-cell office:value-type="float" office:value="0.242012826479438">
                <text:p>0.242012826479438</text:p>
              </table:table-cell>
              <table:table-cell office:value-type="float" office:value="0.221660970343549">
                <text:p>0.221660970343549</text:p>
              </table:table-cell>
            </table:table-row>
            <table:table-row>
              <table:table-cell office:value-type="float" office:value="0.253536449397011">
                <text:p>0.253536449397011</text:p>
              </table:table-cell>
              <table:table-cell office:value-type="float" office:value="0.253536449397011">
                <text:p>0.253536449397011</text:p>
              </table:table-cell>
              <table:table-cell office:value-type="float" office:value="0.249487880750299">
                <text:p>0.249487880750299</text:p>
              </table:table-cell>
            </table:table-row>
            <table:table-row>
              <table:table-cell office:value-type="float" office:value="0.265608778294669">
                <text:p>0.265608778294669</text:p>
              </table:table-cell>
              <table:table-cell office:value-type="float" office:value="0.265608778294669">
                <text:p>0.265608778294669</text:p>
              </table:table-cell>
              <table:table-cell office:value-type="float" office:value="0.281663382150671">
                <text:p>0.281663382150671</text:p>
              </table:table-cell>
            </table:table-row>
            <table:table-row>
              <table:table-cell office:value-type="float" office:value="0.278255940220712">
                <text:p>0.278255940220712</text:p>
              </table:table-cell>
              <table:table-cell office:value-type="float" office:value="0.278255940220712">
                <text:p>0.278255940220712</text:p>
              </table:table-cell>
              <table:table-cell office:value-type="float" office:value="0.319094142768658">
                <text:p>0.319094142768658</text:p>
              </table:table-cell>
            </table:table-row>
            <table:table-row>
              <table:table-cell office:value-type="float" office:value="0.291505306282518">
                <text:p>0.291505306282518</text:p>
              </table:table-cell>
              <table:table-cell office:value-type="float" office:value="0.291505306282518">
                <text:p>0.291505306282518</text:p>
              </table:table-cell>
              <table:table-cell office:value-type="float" office:value="0.362937987561707">
                <text:p>0.362937987561707</text:p>
              </table:table-cell>
            </table:table-row>
            <table:table-row>
              <table:table-cell office:value-type="float" office:value="0.305385550883342">
                <text:p>0.305385550883342</text:p>
              </table:table-cell>
              <table:table-cell office:value-type="float" office:value="0.305385550883342">
                <text:p>0.305385550883342</text:p>
              </table:table-cell>
              <table:table-cell office:value-type="float" office:value="0.414690606575513">
                <text:p>0.414690606575513</text:p>
              </table:table-cell>
            </table:table-row>
            <table:table-row>
              <table:table-cell office:value-type="float" office:value="0.319926713779738">
                <text:p>0.319926713779738</text:p>
              </table:table-cell>
              <table:table-cell office:value-type="float" office:value="0.319926713779738">
                <text:p>0.319926713779738</text:p>
              </table:table-cell>
              <table:table-cell office:value-type="float" office:value="0.47630608205486">
                <text:p>0.47630608205486</text:p>
              </table:table-cell>
            </table:table-row>
            <table:table-row>
              <table:table-cell office:value-type="float" office:value="0.335160265093884">
                <text:p>0.335160265093884</text:p>
              </table:table-cell>
              <table:table-cell office:value-type="float" office:value="0.335160265093884">
                <text:p>0.335160265093884</text:p>
              </table:table-cell>
              <table:table-cell office:value-type="float" office:value="0.550363164812421">
                <text:p>0.550363164812421</text:p>
              </table:table-cell>
            </table:table-row>
            <table:table-row>
              <table:table-cell office:value-type="float" office:value="0.351119173421513">
                <text:p>0.351119173421513</text:p>
              </table:table-cell>
              <table:table-cell office:value-type="float" office:value="0.351119173421513">
                <text:p>0.351119173421513</text:p>
              </table:table-cell>
              <table:table-cell office:value-type="float" office:value="0.64028826077573">
                <text:p>0.64028826077573</text:p>
              </table:table-cell>
            </table:table-row>
            <table:table-row>
              <table:table-cell office:value-type="float" office:value="0.367837977182863">
                <text:p>0.367837977182863</text:p>
              </table:table-cell>
              <table:table-cell office:value-type="float" office:value="0.367837977182863">
                <text:p>0.367837977182863</text:p>
              </table:table-cell>
              <table:table-cell office:value-type="float" office:value="0.750631790574491">
                <text:p>0.750631790574491</text:p>
              </table:table-cell>
            </table:table-row>
            <table:table-row>
              <table:table-cell office:value-type="float" office:value="0.385352859371053">
                <text:p>0.385352859371053</text:p>
              </table:table-cell>
              <table:table-cell office:value-type="float" office:value="0.385352859371053">
                <text:p>0.385352859371053</text:p>
              </table:table-cell>
              <table:table-cell office:value-type="float" office:value="0.887336159091509">
                <text:p>0.887336159091509</text:p>
              </table:table-cell>
            </table:table-row>
            <table:table-row>
              <table:table-cell office:value-type="float" office:value="0.403701725859655">
                <text:p>0.403701725859655</text:p>
              </table:table-cell>
              <table:table-cell office:value-type="float" office:value="0.403701725859655">
                <text:p>0.403701725859655</text:p>
              </table:table-cell>
              <table:table-cell office:value-type="float" office:value="1.05774253962033">
                <text:p>1.05774253962033</text:p>
              </table:table-cell>
            </table:table-row>
            <table:table-row>
              <table:table-cell office:value-type="float" office:value="0.42292428743895">
                <text:p>0.42292428743895</text:p>
              </table:table-cell>
              <table:table-cell office:value-type="float" office:value="0.42292428743895">
                <text:p>0.42292428743895</text:p>
              </table:table-cell>
              <table:table-cell office:value-type="float" office:value="1.26953336977044">
                <text:p>1.26953336977044</text:p>
              </table:table-cell>
            </table:table-row>
            <table:table-row>
              <table:table-cell office:value-type="float" office:value="0.443062145758388">
                <text:p>0.443062145758388</text:p>
              </table:table-cell>
              <table:table-cell office:value-type="float" office:value="0.443062145758388">
                <text:p>0.443062145758388</text:p>
              </table:table-cell>
              <table:table-cell office:value-type="float" office:value="1.52648608900156">
                <text:p>1.52648608900156</text:p>
              </table:table-cell>
            </table:table-row>
            <table:table-row>
              <table:table-cell office:value-type="float" office:value="0.464158883361278">
                <text:p>0.464158883361278</text:p>
              </table:table-cell>
              <table:table-cell office:value-type="float" office:value="0.464158883361278">
                <text:p>0.464158883361278</text:p>
              </table:table-cell>
              <table:table-cell office:value-type="float" office:value="1.81707009250832">
                <text:p>1.81707009250832</text:p>
              </table:table-cell>
            </table:table-row>
            <table:table-row>
              <table:table-cell office:value-type="float" office:value="0.486260158006535">
                <text:p>0.486260158006535</text:p>
              </table:table-cell>
              <table:table-cell office:value-type="float" office:value="0.486260158006535">
                <text:p>0.486260158006535</text:p>
              </table:table-cell>
              <table:table-cell office:value-type="float" office:value="2.09541218649435">
                <text:p>2.09541218649435</text:p>
              </table:table-cell>
            </table:table-row>
            <table:table-row>
              <table:table-cell office:value-type="float" office:value="0.509413801481638">
                <text:p>0.509413801481638</text:p>
              </table:table-cell>
              <table:table-cell office:value-type="float" office:value="0.509413801481638">
                <text:p>0.509413801481638</text:p>
              </table:table-cell>
              <table:table-cell office:value-type="float" office:value="2.27887679572671">
                <text:p>2.27887679572671</text:p>
              </table:table-cell>
            </table:table-row>
            <table:table-row>
              <table:table-cell office:value-type="float" office:value="0.533669923120631">
                <text:p>0.533669923120631</text:p>
              </table:table-cell>
              <table:table-cell office:value-type="float" office:value="0.533669923120631">
                <text:p>0.533669923120631</text:p>
              </table:table-cell>
              <table:table-cell office:value-type="float" office:value="2.30517726447719">
                <text:p>2.30517726447719</text:p>
              </table:table-cell>
            </table:table-row>
            <table:table-row>
              <table:table-cell office:value-type="float" office:value="0.559081018251222">
                <text:p>0.559081018251222</text:p>
              </table:table-cell>
              <table:table-cell office:value-type="float" office:value="0.559081018251222">
                <text:p>0.559081018251222</text:p>
              </table:table-cell>
              <table:table-cell office:value-type="float" office:value="2.19630715726283">
                <text:p>2.19630715726283</text:p>
              </table:table-cell>
            </table:table-row>
            <table:table-row>
              <table:table-cell office:value-type="float" office:value="0.585702081805667">
                <text:p>0.585702081805667</text:p>
              </table:table-cell>
              <table:table-cell office:value-type="float" office:value="0.585702081805667">
                <text:p>0.585702081805667</text:p>
              </table:table-cell>
              <table:table-cell office:value-type="float" office:value="2.02436207894144">
                <text:p>2.02436207894144</text:p>
              </table:table-cell>
            </table:table-row>
            <table:table-row>
              <table:table-cell office:value-type="float" office:value="0.613590727341317">
                <text:p>0.613590727341317</text:p>
              </table:table-cell>
              <table:table-cell office:value-type="float" office:value="0.613590727341317">
                <text:p>0.613590727341317</text:p>
              </table:table-cell>
              <table:table-cell office:value-type="float" office:value="1.8455019154035">
                <text:p>1.8455019154035</text:p>
              </table:table-cell>
            </table:table-row>
            <table:table-row>
              <table:table-cell office:value-type="float" office:value="0.642807311728432">
                <text:p>0.642807311728432</text:p>
              </table:table-cell>
              <table:table-cell office:value-type="float" office:value="0.642807311728432">
                <text:p>0.642807311728432</text:p>
              </table:table-cell>
              <table:table-cell office:value-type="float" office:value="1.68470439573623">
                <text:p>1.68470439573623</text:p>
              </table:table-cell>
            </table:table-row>
            <table:table-row>
              <table:table-cell office:value-type="float" office:value="0.673415065775082">
                <text:p>0.673415065775082</text:p>
              </table:table-cell>
              <table:table-cell office:value-type="float" office:value="0.673415065775082">
                <text:p>0.673415065775082</text:p>
              </table:table-cell>
              <table:table-cell office:value-type="float" office:value="1.54815400506271">
                <text:p>1.54815400506271</text:p>
              </table:table-cell>
            </table:table-row>
            <table:table-row>
              <table:table-cell office:value-type="float" office:value="0.705480231071864">
                <text:p>0.705480231071864</text:p>
              </table:table-cell>
              <table:table-cell office:value-type="float" office:value="0.705480231071864">
                <text:p>0.705480231071864</text:p>
              </table:table-cell>
              <table:table-cell office:value-type="float" office:value="1.43447584759384">
                <text:p>1.43447584759384</text:p>
              </table:table-cell>
            </table:table-row>
            <table:table-row>
              <table:table-cell office:value-type="float" office:value="0.739072203352578">
                <text:p>0.739072203352578</text:p>
              </table:table-cell>
              <table:table-cell office:value-type="float" office:value="0.739072203352578">
                <text:p>0.739072203352578</text:p>
              </table:table-cell>
              <table:table-cell office:value-type="float" office:value="1.34016221445857">
                <text:p>1.34016221445857</text:p>
              </table:table-cell>
            </table:table-row>
            <table:table-row>
              <table:table-cell office:value-type="float" office:value="0.774263682681127">
                <text:p>0.774263682681127</text:p>
              </table:table-cell>
              <table:table-cell office:value-type="float" office:value="0.774263682681127">
                <text:p>0.774263682681127</text:p>
              </table:table-cell>
              <table:table-cell office:value-type="float" office:value="1.26160731161728">
                <text:p>1.26160731161728</text:p>
              </table:table-cell>
            </table:table-row>
            <table:table-row>
              <table:table-cell office:value-type="float" office:value="0.811130830789687">
                <text:p>0.811130830789687</text:p>
              </table:table-cell>
              <table:table-cell office:value-type="float" office:value="0.811130830789687">
                <text:p>0.811130830789687</text:p>
              </table:table-cell>
              <table:table-cell office:value-type="float" office:value="1.19571316820432">
                <text:p>1.19571316820432</text:p>
              </table:table-cell>
            </table:table-row>
            <table:table-row>
              <table:table-cell office:value-type="float" office:value="0.849753435908644">
                <text:p>0.849753435908644</text:p>
              </table:table-cell>
              <table:table-cell office:value-type="float" office:value="0.849753435908644">
                <text:p>0.849753435908644</text:p>
              </table:table-cell>
              <table:table-cell office:value-type="float" office:value="1.13997900993206">
                <text:p>1.13997900993206</text:p>
              </table:table-cell>
            </table:table-row>
            <table:table-row>
              <table:table-cell office:value-type="float" office:value="0.890215085445039">
                <text:p>0.890215085445039</text:p>
              </table:table-cell>
              <table:table-cell office:value-type="float" office:value="0.890215085445039">
                <text:p>0.890215085445039</text:p>
              </table:table-cell>
              <table:table-cell office:value-type="float" office:value="1.0924310352398">
                <text:p>1.0924310352398</text:p>
              </table:table-cell>
            </table:table-row>
            <table:table-row>
              <table:table-cell office:value-type="float" office:value="0.93260334688322">
                <text:p>0.93260334688322</text:p>
              </table:table-cell>
              <table:table-cell office:value-type="float" office:value="0.93260334688322">
                <text:p>0.93260334688322</text:p>
              </table:table-cell>
              <table:table-cell office:value-type="float" office:value="1.05151979897039">
                <text:p>1.05151979897039</text:p>
              </table:table-cell>
            </table:table-row>
            <table:table-row>
              <table:table-cell office:value-type="float" office:value="0.977009957299225">
                <text:p>0.977009957299225</text:p>
              </table:table-cell>
              <table:table-cell office:value-type="float" office:value="0.977009957299225">
                <text:p>0.977009957299225</text:p>
              </table:table-cell>
              <table:table-cell office:value-type="float" office:value="1.01602573578849">
                <text:p>1.01602573578849</text:p>
              </table:table-cell>
            </table:table-row>
            <table:table-row>
              <table:table-cell office:value-type="float" office:value="1.02353102189903">
                <text:p>1.02353102189903</text:p>
              </table:table-cell>
              <table:table-cell office:value-type="float" office:value="1.02353102189903">
                <text:p>1.02353102189903</text:p>
              </table:table-cell>
              <table:table-cell office:value-type="float" office:value="0.984982517376088">
                <text:p>0.984982517376088</text:p>
              </table:table-cell>
            </table:table-row>
            <table:table-row>
              <table:table-cell office:value-type="float" office:value="1.07226722201032">
                <text:p>1.07226722201032</text:p>
              </table:table-cell>
              <table:table-cell office:value-type="float" office:value="1.07226722201032">
                <text:p>1.07226722201032</text:p>
              </table:table-cell>
              <table:table-cell office:value-type="float" office:value="0.957617839823514">
                <text:p>0.957617839823514</text:p>
              </table:table-cell>
            </table:table-row>
            <table:table-row>
              <table:table-cell office:value-type="float" office:value="1.12332403297803">
                <text:p>1.12332403297803</text:p>
              </table:table-cell>
              <table:table-cell office:value-type="float" office:value="1.12332403297803">
                <text:p>1.12332403297803</text:p>
              </table:table-cell>
              <table:table-cell office:value-type="float" office:value="0.933308558044147">
                <text:p>0.933308558044147</text:p>
              </table:table-cell>
            </table:table-row>
            <table:table-row>
              <table:table-cell office:value-type="float" office:value="1.176811952435">
                <text:p>1.176811952435</text:p>
              </table:table-cell>
              <table:table-cell office:value-type="float" office:value="1.176811952435">
                <text:p>1.176811952435</text:p>
              </table:table-cell>
              <table:table-cell office:value-type="float" office:value="0.911546893825399">
                <text:p>0.911546893825399</text:p>
              </table:table-cell>
            </table:table-row>
            <table:table-row>
              <table:table-cell office:value-type="float" office:value="1.23284673944207">
                <text:p>1.23284673944207</text:p>
              </table:table-cell>
              <table:table-cell office:value-type="float" office:value="1.23284673944207">
                <text:p>1.23284673944207</text:p>
              </table:table-cell>
              <table:table-cell office:value-type="float" office:value="0.891914965156981">
                <text:p>0.891914965156981</text:p>
              </table:table-cell>
            </table:table-row>
            <table:table-row>
              <table:table-cell office:value-type="float" office:value="1.29154966501488">
                <text:p>1.29154966501488</text:p>
              </table:table-cell>
              <table:table-cell office:value-type="float" office:value="1.29154966501488">
                <text:p>1.29154966501488</text:p>
              </table:table-cell>
              <table:table-cell office:value-type="float" office:value="0.874065506635741">
                <text:p>0.874065506635741</text:p>
              </table:table-cell>
            </table:table-row>
            <table:table-row>
              <table:table-cell office:value-type="float" office:value="1.35304777457981">
                <text:p>1.35304777457981</text:p>
              </table:table-cell>
              <table:table-cell office:value-type="float" office:value="1.35304777457981">
                <text:p>1.35304777457981</text:p>
              </table:table-cell>
              <table:table-cell office:value-type="float" office:value="0.857707189667733">
                <text:p>0.857707189667733</text:p>
              </table:table-cell>
            </table:table-row>
            <table:table-row>
              <table:table-cell office:value-type="float" office:value="1.41747416292681">
                <text:p>1.41747416292681</text:p>
              </table:table-cell>
              <table:table-cell office:value-type="float" office:value="1.41747416292681">
                <text:p>1.41747416292681</text:p>
              </table:table-cell>
              <table:table-cell office:value-type="float" office:value="0.842593371548838">
                <text:p>0.842593371548838</text:p>
              </table:table-cell>
            </table:table-row>
            <table:table-row>
              <table:table-cell office:value-type="float" office:value="1.48496826225447">
                <text:p>1.48496826225447</text:p>
              </table:table-cell>
              <table:table-cell office:value-type="float" office:value="1.48496826225447">
                <text:p>1.48496826225447</text:p>
              </table:table-cell>
              <table:table-cell office:value-type="float" office:value="0.828513416062358">
                <text:p>0.828513416062358</text:p>
              </table:table-cell>
            </table:table-row>
            <table:table-row>
              <table:table-cell office:value-type="float" office:value="1.55567614393047">
                <text:p>1.55567614393047</text:p>
              </table:table-cell>
              <table:table-cell office:value-type="float" office:value="1.55567614393047">
                <text:p>1.55567614393047</text:p>
              </table:table-cell>
              <table:table-cell office:value-type="float" office:value="0.815285957472161">
                <text:p>0.815285957472161</text:p>
              </table:table-cell>
            </table:table-row>
            <table:table-row>
              <table:table-cell office:value-type="float" office:value="1.62975083462064">
                <text:p>1.62975083462064</text:p>
              </table:table-cell>
              <table:table-cell office:value-type="float" office:value="1.62975083462064">
                <text:p>1.62975083462064</text:p>
              </table:table-cell>
              <table:table-cell office:value-type="float" office:value="0.802753646020151">
                <text:p>0.802753646020151</text:p>
              </table:table-cell>
            </table:table-row>
            <table:table-row>
              <table:table-cell office:value-type="float" office:value="1.70735264747069">
                <text:p>1.70735264747069</text:p>
              </table:table-cell>
              <table:table-cell office:value-type="float" office:value="1.70735264747069">
                <text:p>1.70735264747069</text:p>
              </table:table-cell>
              <table:table-cell office:value-type="float" office:value="0.790779033335985">
                <text:p>0.790779033335985</text:p>
              </table:table-cell>
            </table:table-row>
            <table:table-row>
              <table:table-cell office:value-type="float" office:value="1.78864952905744">
                <text:p>1.78864952905744</text:p>
              </table:table-cell>
              <table:table-cell office:value-type="float" office:value="1.78864952905744">
                <text:p>1.78864952905744</text:p>
              </table:table-cell>
              <table:table-cell office:value-type="float" office:value="0.779241343330247">
                <text:p>0.779241343330247</text:p>
              </table:table-cell>
            </table:table-row>
            <table:table-row>
              <table:table-cell office:value-type="float" office:value="1.87381742286038">
                <text:p>1.87381742286038</text:p>
              </table:table-cell>
              <table:table-cell office:value-type="float" office:value="1.87381742286038">
                <text:p>1.87381742286038</text:p>
              </table:table-cell>
              <table:table-cell office:value-type="float" office:value="0.768033937459897">
                <text:p>0.768033937459897</text:p>
              </table:table-cell>
            </table:table-row>
            <table:table-row>
              <table:table-cell office:value-type="float" office:value="1.96304065004027">
                <text:p>1.96304065004027</text:p>
              </table:table-cell>
              <table:table-cell office:value-type="float" office:value="1.96304065004027">
                <text:p>1.96304065004027</text:p>
              </table:table-cell>
              <table:table-cell office:value-type="float" office:value="0.757062329376188">
                <text:p>0.757062329376188</text:p>
              </table:table-cell>
            </table:table-row>
            <table:table-row>
              <table:table-cell office:value-type="float" office:value="2.05651230834865">
                <text:p>2.05651230834865</text:p>
              </table:table-cell>
              <table:table-cell office:value-type="float" office:value="2.05651230834865">
                <text:p>2.05651230834865</text:p>
              </table:table-cell>
              <table:table-cell office:value-type="float" office:value="0.746242637626552">
                <text:p>0.746242637626552</text:p>
              </table:table-cell>
            </table:table-row>
            <table:table-row>
              <table:table-cell office:value-type="float" office:value="2.15443469003188">
                <text:p>2.15443469003188</text:p>
              </table:table-cell>
              <table:table-cell office:value-type="float" office:value="2.15443469003188">
                <text:p>2.15443469003188</text:p>
              </table:table-cell>
              <table:table-cell office:value-type="float" office:value="0.735500389661369">
                <text:p>0.735500389661369</text:p>
              </table:table-cell>
            </table:table-row>
            <table:table-row>
              <table:table-cell office:value-type="float" office:value="2.25701971963392">
                <text:p>2.25701971963392</text:p>
              </table:table-cell>
              <table:table-cell office:value-type="float" office:value="2.25701971963392">
                <text:p>2.25701971963392</text:p>
              </table:table-cell>
              <table:table-cell office:value-type="float" office:value="0.72476960831905">
                <text:p>0.72476960831905</text:p>
              </table:table-cell>
            </table:table-row>
            <table:table-row>
              <table:table-cell office:value-type="float" office:value="2.36448941264541">
                <text:p>2.36448941264541</text:p>
              </table:table-cell>
              <table:table-cell office:value-type="float" office:value="2.36448941264541">
                <text:p>2.36448941264541</text:p>
              </table:table-cell>
              <table:table-cell office:value-type="float" office:value="0.713992124989251">
                <text:p>0.713992124989251</text:p>
              </table:table-cell>
            </table:table-row>
            <table:table-row>
              <table:table-cell office:value-type="float" office:value="2.47707635599171">
                <text:p>2.47707635599171</text:p>
              </table:table-cell>
              <table:table-cell office:value-type="float" office:value="2.47707635599171">
                <text:p>2.47707635599171</text:p>
              </table:table-cell>
              <table:table-cell office:value-type="float" office:value="0.703117073084569">
                <text:p>0.703117073084569</text:p>
              </table:table-cell>
            </table:table-row>
            <table:table-row>
              <table:table-cell office:value-type="float" office:value="2.59502421139974">
                <text:p>2.59502421139974</text:p>
              </table:table-cell>
              <table:table-cell office:value-type="float" office:value="2.59502421139974">
                <text:p>2.59502421139974</text:p>
              </table:table-cell>
              <table:table-cell office:value-type="float" office:value="0.69210052226705">
                <text:p>0.69210052226705</text:p>
              </table:table-cell>
            </table:table-row>
            <table:table-row>
              <table:table-cell office:value-type="float" office:value="2.71858824273294">
                <text:p>2.71858824273294</text:p>
              </table:table-cell>
              <table:table-cell office:value-type="float" office:value="2.71858824273294">
                <text:p>2.71858824273294</text:p>
              </table:table-cell>
              <table:table-cell office:value-type="float" office:value="0.680905218837493">
                <text:p>0.680905218837493</text:p>
              </table:table-cell>
            </table:table-row>
            <table:table-row>
              <table:table-cell office:value-type="float" office:value="2.8480358684358">
                <text:p>2.8480358684358</text:p>
              </table:table-cell>
              <table:table-cell office:value-type="float" office:value="2.8480358684358">
                <text:p>2.8480358684358</text:p>
              </table:table-cell>
              <table:table-cell office:value-type="float" office:value="0.669500401406914">
                <text:p>0.669500401406914</text:p>
              </table:table-cell>
            </table:table-row>
            <table:table-row>
              <table:table-cell office:value-type="float" office:value="2.98364724028334">
                <text:p>2.98364724028334</text:p>
              </table:table-cell>
              <table:table-cell office:value-type="float" office:value="2.98364724028334">
                <text:p>2.98364724028334</text:p>
              </table:table-cell>
              <table:table-cell office:value-type="float" office:value="0.657861663919623">
                <text:p>0.657861663919623</text:p>
              </table:table-cell>
            </table:table-row>
            <table:table-row>
              <table:table-cell office:value-type="float" office:value="3.12571584968824">
                <text:p>3.12571584968824</text:p>
              </table:table-cell>
              <table:table-cell office:value-type="float" office:value="3.12571584968824">
                <text:p>3.12571584968824</text:p>
              </table:table-cell>
              <table:table-cell office:value-type="float" office:value="0.645970840684209">
                <text:p>0.645970840684209</text:p>
              </table:table-cell>
            </table:table-row>
            <table:table-row>
              <table:table-cell office:value-type="float" office:value="3.27454916287773">
                <text:p>3.27454916287773</text:p>
              </table:table-cell>
              <table:table-cell office:value-type="float" office:value="3.27454916287773">
                <text:p>3.27454916287773</text:p>
              </table:table-cell>
              <table:table-cell office:value-type="float" office:value="0.633815890609408">
                <text:p>0.633815890609408</text:p>
              </table:table-cell>
            </table:table-row>
            <table:table-row>
              <table:table-cell office:value-type="float" office:value="3.43046928631492">
                <text:p>3.43046928631492</text:p>
              </table:table-cell>
              <table:table-cell office:value-type="float" office:value="3.43046928631492">
                <text:p>3.43046928631492</text:p>
              </table:table-cell>
              <table:table-cell office:value-type="float" office:value="0.621390760575552">
                <text:p>0.621390760575552</text:p>
              </table:table-cell>
            </table:table-row>
            <table:table-row>
              <table:table-cell office:value-type="float" office:value="3.59381366380463">
                <text:p>3.59381366380463</text:p>
              </table:table-cell>
              <table:table-cell office:value-type="float" office:value="3.59381366380463">
                <text:p>3.59381366380463</text:p>
              </table:table-cell>
              <table:table-cell office:value-type="float" office:value="0.608695210956977">
                <text:p>0.608695210956977</text:p>
              </table:table-cell>
            </table:table-row>
            <table:table-row>
              <table:table-cell office:value-type="float" office:value="3.76493580679247">
                <text:p>3.76493580679247</text:p>
              </table:table-cell>
              <table:table-cell office:value-type="float" office:value="3.76493580679247">
                <text:p>3.76493580679247</text:p>
              </table:table-cell>
              <table:table-cell office:value-type="float" office:value="0.595734589820187">
                <text:p>0.595734589820187</text:p>
              </table:table-cell>
            </table:table-row>
            <table:table-row>
              <table:table-cell office:value-type="float" office:value="3.94420605943766">
                <text:p>3.94420605943766</text:p>
              </table:table-cell>
              <table:table-cell office:value-type="float" office:value="3.94420605943766">
                <text:p>3.94420605943766</text:p>
              </table:table-cell>
              <table:table-cell office:value-type="float" office:value="0.582519546244932">
                <text:p>0.582519546244932</text:p>
              </table:table-cell>
            </table:table-row>
            <table:table-row>
              <table:table-cell office:value-type="float" office:value="4.13201240011534">
                <text:p>4.13201240011534</text:p>
              </table:table-cell>
              <table:table-cell office:value-type="float" office:value="4.13201240011534">
                <text:p>4.13201240011534</text:p>
              </table:table-cell>
              <table:table-cell office:value-type="float" office:value="0.569065677457536">
                <text:p>0.569065677457536</text:p>
              </table:table-cell>
            </table:table-row>
            <table:table-row>
              <table:table-cell office:value-type="float" office:value="4.32876128108306">
                <text:p>4.32876128108306</text:p>
              </table:table-cell>
              <table:table-cell office:value-type="float" office:value="4.32876128108306">
                <text:p>4.32876128108306</text:p>
              </table:table-cell>
              <table:table-cell office:value-type="float" office:value="0.555393108864448">
                <text:p>0.555393108864448</text:p>
              </table:table-cell>
            </table:table-row>
            <table:table-row>
              <table:table-cell office:value-type="float" office:value="4.53487850812858">
                <text:p>4.53487850812858</text:p>
              </table:table-cell>
              <table:table-cell office:value-type="float" office:value="4.53487850812858">
                <text:p>4.53487850812858</text:p>
              </table:table-cell>
              <table:table-cell office:value-type="float" office:value="0.541526010413957">
                <text:p>0.541526010413957</text:p>
              </table:table-cell>
            </table:table-row>
            <table:table-row>
              <table:table-cell office:value-type="float" office:value="4.7508101621028">
                <text:p>4.7508101621028</text:p>
              </table:table-cell>
              <table:table-cell office:value-type="float" office:value="4.7508101621028">
                <text:p>4.7508101621028</text:p>
              </table:table-cell>
              <table:table-cell office:value-type="float" office:value="0.527492056753051">
                <text:p>0.527492056753051</text:p>
              </table:table-cell>
            </table:table-row>
            <table:table-row>
              <table:table-cell office:value-type="float" office:value="4.97702356433211">
                <text:p>4.97702356433211</text:p>
              </table:table-cell>
              <table:table-cell office:value-type="float" office:value="4.97702356433211">
                <text:p>4.97702356433211</text:p>
              </table:table-cell>
              <table:table-cell office:value-type="float" office:value="0.513321842143363">
                <text:p>0.513321842143363</text:p>
              </table:table-cell>
            </table:table-row>
            <table:table-row>
              <table:table-cell office:value-type="float" office:value="5.21400828799968">
                <text:p>5.21400828799968</text:p>
              </table:table-cell>
              <table:table-cell office:value-type="float" office:value="5.21400828799968">
                <text:p>5.21400828799968</text:p>
              </table:table-cell>
              <table:table-cell office:value-type="float" office:value="0.499048263843831">
                <text:p>0.499048263843831</text:p>
              </table:table-cell>
            </table:table-row>
            <table:table-row>
              <table:table-cell office:value-type="float" office:value="5.46227721768434">
                <text:p>5.46227721768434</text:p>
              </table:table-cell>
              <table:table-cell office:value-type="float" office:value="5.46227721768434">
                <text:p>5.46227721768434</text:p>
              </table:table-cell>
              <table:table-cell office:value-type="float" office:value="0.48470588950132">
                <text:p>0.48470588950132</text:p>
              </table:table-cell>
            </table:table-row>
            <table:table-row>
              <table:table-cell office:value-type="float" office:value="5.72236765935022">
                <text:p>5.72236765935022</text:p>
              </table:table-cell>
              <table:table-cell office:value-type="float" office:value="5.72236765935022">
                <text:p>5.72236765935022</text:p>
              </table:table-cell>
              <table:table-cell office:value-type="float" office:value="0.470330324929734">
                <text:p>0.470330324929734</text:p>
              </table:table-cell>
            </table:table-row>
            <table:table-row>
              <table:table-cell office:value-type="float" office:value="5.99484250318941">
                <text:p>5.99484250318941</text:p>
              </table:table-cell>
              <table:table-cell office:value-type="float" office:value="5.99484250318941">
                <text:p>5.99484250318941</text:p>
              </table:table-cell>
              <table:table-cell office:value-type="float" office:value="0.455957598499497">
                <text:p>0.455957598499497</text:p>
              </table:table-cell>
            </table:table-row>
            <table:table-row>
              <table:table-cell office:value-type="float" office:value="6.28029144183425">
                <text:p>6.28029144183425</text:p>
              </table:table-cell>
              <table:table-cell office:value-type="float" office:value="6.28029144183425">
                <text:p>6.28029144183425</text:p>
              </table:table-cell>
              <table:table-cell office:value-type="float" office:value="0.441623577277995">
                <text:p>0.441623577277995</text:p>
              </table:table-cell>
            </table:table-row>
            <table:table-row>
              <table:table-cell office:value-type="float" office:value="6.57933224657568">
                <text:p>6.57933224657568</text:p>
              </table:table-cell>
              <table:table-cell office:value-type="float" office:value="6.57933224657568">
                <text:p>6.57933224657568</text:p>
              </table:table-cell>
              <table:table-cell office:value-type="float" office:value="0.427363428200374">
                <text:p>0.427363428200374</text:p>
              </table:table-cell>
            </table:table-row>
            <table:table-row>
              <table:table-cell office:value-type="float" office:value="6.8926121043497">
                <text:p>6.8926121043497</text:p>
              </table:table-cell>
              <table:table-cell office:value-type="float" office:value="6.8926121043497">
                <text:p>6.8926121043497</text:p>
              </table:table-cell>
              <table:table-cell office:value-type="float" office:value="0.413211135100804">
                <text:p>0.413211135100804</text:p>
              </table:table-cell>
            </table:table-row>
            <table:table-row>
              <table:table-cell office:value-type="float" office:value="7.22080901838546">
                <text:p>7.22080901838546</text:p>
              </table:table-cell>
              <table:table-cell office:value-type="float" office:value="7.22080901838546">
                <text:p>7.22080901838546</text:p>
              </table:table-cell>
              <table:table-cell office:value-type="float" office:value="0.399199079615408">
                <text:p>0.399199079615408</text:p>
              </table:table-cell>
            </table:table-row>
            <table:table-row>
              <table:table-cell office:value-type="float" office:value="7.56463327554629">
                <text:p>7.56463327554629</text:p>
              </table:table-cell>
              <table:table-cell office:value-type="float" office:value="7.56463327554629">
                <text:p>7.56463327554629</text:p>
              </table:table-cell>
              <table:table-cell office:value-type="float" office:value="0.385357691001363">
                <text:p>0.385357691001363</text:p>
              </table:table-cell>
            </table:table-row>
            <table:table-row>
              <table:table-cell office:value-type="float" office:value="7.92482898353917">
                <text:p>7.92482898353917</text:p>
              </table:table-cell>
              <table:table-cell office:value-type="float" office:value="7.92482898353917">
                <text:p>7.92482898353917</text:p>
              </table:table-cell>
              <table:table-cell office:value-type="float" office:value="0.371715167007132">
                <text:p>0.371715167007132</text:p>
              </table:table-cell>
            </table:table-row>
            <table:table-row>
              <table:table-cell office:value-type="float" office:value="8.30217568131974">
                <text:p>8.30217568131974</text:p>
              </table:table-cell>
              <table:table-cell office:value-type="float" office:value="8.30217568131974">
                <text:p>8.30217568131974</text:p>
              </table:table-cell>
              <table:table-cell office:value-type="float" office:value="0.35829726524827">
                <text:p>0.35829726524827</text:p>
              </table:table-cell>
            </table:table-row>
            <table:table-row>
              <table:table-cell office:value-type="float" office:value="8.69749002617784">
                <text:p>8.69749002617784</text:p>
              </table:table-cell>
              <table:table-cell office:value-type="float" office:value="8.69749002617784">
                <text:p>8.69749002617784</text:p>
              </table:table-cell>
              <table:table-cell office:value-type="float" office:value="0.34512716222096">
                <text:p>0.34512716222096</text:p>
              </table:table-cell>
            </table:table-row>
            <table:table-row>
              <table:table-cell office:value-type="float" office:value="9.11162756115489">
                <text:p>9.11162756115489</text:p>
              </table:table-cell>
              <table:table-cell office:value-type="float" office:value="9.11162756115489">
                <text:p>9.11162756115489</text:p>
              </table:table-cell>
              <table:table-cell office:value-type="float" office:value="0.332225375203692">
                <text:p>0.332225375203692</text:p>
              </table:table-cell>
            </table:table-row>
            <table:table-row>
              <table:table-cell office:value-type="float" office:value="9.54548456661834">
                <text:p>9.54548456661834</text:p>
              </table:table-cell>
              <table:table-cell office:value-type="float" office:value="9.54548456661834">
                <text:p>9.54548456661834</text:p>
              </table:table-cell>
              <table:table-cell office:value-type="float" office:value="0.319609740893663">
                <text:p>0.3196097408936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07295443696322">
                <text:p>0.307295443696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4.2$Windows_X86_64 LibreOffice_project/0229ac93fcf0d7cbc6376066c6f35021cef002d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